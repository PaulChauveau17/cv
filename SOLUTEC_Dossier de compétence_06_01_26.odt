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29000000A0600000A06DF6C5596.svg" manifest:media-type="image/svg+xml"/>
  <manifest:file-entry manifest:full-path="Pictures/100012450000635200006352B2FCB8BD.svg" manifest:media-type="image/svg+xml"/>
  <manifest:file-entry manifest:full-path="Pictures/100000010000019E000000CC089EBF26.png" manifest:media-type="image/png"/>
  <manifest:file-entry manifest:full-path="Pictures/10000001000002C3000002C32D9E0E01.png" manifest:media-type="image/png"/>
  <manifest:file-entry manifest:full-path="Pictures/100000010000007900000079172A1B23.png" manifest:media-type="image/png"/>
  <manifest:file-entry manifest:full-path="Pictures/10000001000000790000007991C52F4D.png" manifest:media-type="image/png"/>
  <manifest:file-entry manifest:full-path="Pictures/1000198F00000A0600000A0656D890BB.svg" manifest:media-type="image/svg+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entury Gothic" svg:font-family="'Century Gothic'" style:font-family-generic="swiss"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Times New Roman" svg:font-family="'Times New Roman'" style:font-family-generic="system" style:font-pitch="variable"/>
    <style:font-face style:name="Tw Cen MT" svg:font-family="'Tw Cen MT'" style:font-family-generic="system" style:font-pitch="variable"/>
    <style:font-face style:name="游ゴシック Light" svg:font-family="'游ゴシック Light'" style:font-family-generic="system" style:font-pitch="variable"/>
  </office:font-face-decls>
  <office:automatic-styles>
    <style:style style:name="Table1" style:family="table">
      <style:table-properties style:width="17.789cm" fo:margin-top="0cm" fo:margin-bottom="0cm" table:align="center" style:writing-mode="lr-tb"/>
    </style:style>
    <style:style style:name="Table1.A" style:family="table-column">
      <style:table-column-properties style:column-width="1.976cm"/>
    </style:style>
    <style:style style:name="Table1.B" style:family="table-column">
      <style:table-column-properties style:column-width="7.906cm"/>
    </style:style>
    <style:style style:name="Table1.C" style:family="table-column">
      <style:table-column-properties style:column-width="7.908cm"/>
    </style:style>
    <style:style style:name="Table1.1" style:family="table-row">
      <style:table-row-properties style:min-row-height="1.635cm" fo:keep-together="auto"/>
    </style:style>
    <style:style style:name="Table1.A1" style:family="table-cell">
      <style:table-cell-properties fo:padding-left="0.191cm" fo:padding-right="0.191cm" fo:padding-top="0cm" fo:padding-bottom="0cm" fo:border="none" style:writing-mode="lr-tb"/>
    </style:style>
    <style:style style:name="Table1.B1" style:family="table-cell">
      <style:table-cell-properties style:vertical-align="middle" fo:padding-left="0.191cm" fo:padding-right="0.191cm" fo:padding-top="0cm" fo:padding-bottom="0cm" fo:border-left="none" fo:border-right="none" fo:border-top="none" fo:border-bottom="1pt solid #e90649" style:writing-mode="lr-tb"/>
    </style:style>
    <style:style style:name="Table1.2" style:family="table-row">
      <style:table-row-properties style:min-row-height="0.557cm" fo:keep-together="auto"/>
    </style:style>
    <style:style style:name="Table1.B2" style:family="table-cell">
      <style:table-cell-properties style:vertical-align="bottom" fo:padding-left="0.191cm" fo:padding-right="0.191cm" fo:padding-top="0cm" fo:padding-bottom="0cm" fo:border-left="none" fo:border-right="none" fo:border-top="1pt solid #e90649" fo:border-bottom="none" style:writing-mode="lr-tb"/>
    </style:style>
    <style:style style:name="Table1.B3" style:family="table-cell">
      <style:table-cell-properties style:vertical-align="bottom" fo:padding-left="0.191cm" fo:padding-right="0.191cm" fo:padding-top="0cm" fo:padding-bottom="0cm" fo:border-left="none" fo:border-right="none" fo:border-top="none" fo:border-bottom="1pt solid #e90649" style:writing-mode="lr-tb"/>
    </style:style>
    <style:style style:name="Table1.B6" style:family="table-cell">
      <style:table-cell-properties style:vertical-align="bottom" fo:padding-left="0.191cm" fo:padding-right="0.191cm" fo:padding-top="0cm" fo:padding-bottom="0cm" fo:border="none" style:writing-mode="lr-tb"/>
    </style:style>
    <style:style style:name="Table1.B7" style:family="table-cell">
      <style:table-cell-properties style:vertical-align="bottom" fo:padding-left="0.191cm" fo:padding-right="0.191cm" fo:padding-top="0cm" fo:padding-bottom="0cm" fo:border-left="none" fo:border-right="none" fo:border-top="none" fo:border-bottom="1pt solid #e40046" style:writing-mode="lr-tb"/>
    </style:style>
    <style:style style:name="Table1.B8" style:family="table-cell">
      <style:table-cell-properties style:vertical-align="bottom" fo:padding-left="0.191cm" fo:padding-right="0.191cm" fo:padding-top="0cm" fo:padding-bottom="0cm" fo:border-left="none" fo:border-right="none" fo:border-top="1pt solid #e40046" fo:border-bottom="none" style:writing-mode="lr-tb"/>
    </style:style>
    <style:style style:name="Table1.B9" style:family="table-cell">
      <style:table-cell-properties style:vertical-align="middle" fo:padding-left="0.191cm" fo:padding-right="0.191cm" fo:padding-top="0cm" fo:padding-bottom="0cm" fo:border-left="none" fo:border-right="none" fo:border-top="none" fo:border-bottom="1pt solid #e40046" style:writing-mode="lr-tb"/>
    </style:style>
    <style:style style:name="Table1.C10" style:family="table-cell">
      <style:table-cell-properties fo:padding-left="0.191cm" fo:padding-right="0.191cm" fo:padding-top="0cm" fo:padding-bottom="0cm" fo:border-left="none" fo:border-right="none" fo:border-top="1pt solid #e40046" fo:border-bottom="none" style:writing-mode="lr-tb"/>
    </style:style>
    <style:style style:name="Table2" style:family="table">
      <style:table-properties style:width="6.752cm" fo:margin-top="0cm" fo:margin-bottom="0cm" table:align="right" style:writing-mode="lr-tb"/>
    </style:style>
    <style:style style:name="Table2.A" style:family="table-column">
      <style:table-column-properties style:column-width="4.443cm"/>
    </style:style>
    <style:style style:name="Table2.B" style:family="table-column">
      <style:table-column-properties style:column-width="2.309cm"/>
    </style:style>
    <style:style style:name="Table2.1" style:family="table-row">
      <style:table-row-properties fo:keep-together="auto"/>
    </style:style>
    <style:style style:name="Table2.A1" style:family="table-cell">
      <style:table-cell-properties fo:background-color="transparent" fo:padding-left="0.191cm" fo:padding-right="0.191cm" fo:padding-top="0cm" fo:padding-bottom="0cm" fo:border-left="none" fo:border-right="0.5pt solid #808080" fo:border-top="none" fo:border-bottom="none" style:writing-mode="lr-tb">
        <style:background-image/>
      </style:table-cell-properties>
    </style:style>
    <style:style style:name="Table2.B1" style:family="table-cell">
      <style:table-cell-properties fo:padding-left="0.191cm" fo:padding-right="0.191cm" fo:padding-top="0cm" fo:padding-bottom="0cm" fo:border-left="0.5pt solid #808080" fo:border-right="none" fo:border-top="none" fo:border-bottom="none" style:writing-mode="lr-tb"/>
    </style:style>
    <style:style style:name="Table3" style:family="table">
      <style:table-properties style:width="7.255cm" fo:margin-left="8.758cm" fo:margin-top="0cm" fo:margin-bottom="0cm" table:align="left" style:writing-mode="lr-tb"/>
    </style:style>
    <style:style style:name="Table3.A" style:family="table-column">
      <style:table-column-properties style:column-width="4.946cm"/>
    </style:style>
    <style:style style:name="Table3.B" style:family="table-column">
      <style:table-column-properties style:column-width="2.309cm"/>
    </style:style>
    <style:style style:name="Table3.1" style:family="table-row">
      <style:table-row-properties fo:keep-together="auto"/>
    </style:style>
    <style:style style:name="Table3.A1" style:family="table-cell">
      <style:table-cell-properties fo:background-color="transparent" fo:padding-left="0.191cm" fo:padding-right="0.191cm" fo:padding-top="0cm" fo:padding-bottom="0cm" fo:border-left="none" fo:border-right="0.5pt solid #808080" fo:border-top="none" fo:border-bottom="none" style:writing-mode="lr-tb">
        <style:background-image/>
      </style:table-cell-properties>
    </style:style>
    <style:style style:name="Table3.B1" style:family="table-cell">
      <style:table-cell-properties fo:padding-left="0.191cm" fo:padding-right="0.191cm" fo:padding-top="0cm" fo:padding-bottom="0cm" fo:border-left="0.5pt solid #808080" fo:border-right="none" fo:border-top="none" fo:border-bottom="none" style:writing-mode="lr-tb"/>
    </style:style>
    <style:style style:name="Table1" style:family="table">
      <style:table-properties style:width="17.789cm" fo:margin-top="0cm" fo:margin-bottom="0cm" table:align="center" style:writing-mode="lr-tb"/>
    </style:style>
    <style:style style:name="Table1.A" style:family="table-column">
      <style:table-column-properties style:column-width="1.976cm"/>
    </style:style>
    <style:style style:name="Table1.B" style:family="table-column">
      <style:table-column-properties style:column-width="7.906cm"/>
    </style:style>
    <style:style style:name="Table1.C" style:family="table-column">
      <style:table-column-properties style:column-width="7.908cm"/>
    </style:style>
    <style:style style:name="Table1.1" style:family="table-row">
      <style:table-row-properties style:min-row-height="1.635cm" fo:keep-together="auto"/>
    </style:style>
    <style:style style:name="Table1.A1" style:family="table-cell">
      <style:table-cell-properties fo:padding-left="0.191cm" fo:padding-right="0.191cm" fo:padding-top="0cm" fo:padding-bottom="0cm" fo:border="none" style:writing-mode="lr-tb"/>
    </style:style>
    <style:style style:name="Table1.B1" style:family="table-cell">
      <style:table-cell-properties style:vertical-align="middle" fo:padding-left="0.191cm" fo:padding-right="0.191cm" fo:padding-top="0cm" fo:padding-bottom="0cm" fo:border-left="none" fo:border-right="none" fo:border-top="none" fo:border-bottom="1pt solid #e90649" style:writing-mode="lr-tb"/>
    </style:style>
    <style:style style:name="Table1.2" style:family="table-row">
      <style:table-row-properties style:min-row-height="0.557cm" fo:keep-together="auto"/>
    </style:style>
    <style:style style:name="Table1.B2" style:family="table-cell">
      <style:table-cell-properties style:vertical-align="bottom" fo:padding-left="0.191cm" fo:padding-right="0.191cm" fo:padding-top="0cm" fo:padding-bottom="0cm" fo:border-left="none" fo:border-right="none" fo:border-top="1pt solid #e90649" fo:border-bottom="none" style:writing-mode="lr-tb"/>
    </style:style>
    <style:style style:name="Table1.B3" style:family="table-cell">
      <style:table-cell-properties style:vertical-align="bottom" fo:padding-left="0.191cm" fo:padding-right="0.191cm" fo:padding-top="0cm" fo:padding-bottom="0cm" fo:border-left="none" fo:border-right="none" fo:border-top="none" fo:border-bottom="1pt solid #e90649" style:writing-mode="lr-tb"/>
    </style:style>
    <style:style style:name="Table1.B6" style:family="table-cell">
      <style:table-cell-properties style:vertical-align="bottom" fo:padding-left="0.191cm" fo:padding-right="0.191cm" fo:padding-top="0cm" fo:padding-bottom="0cm" fo:border="none" style:writing-mode="lr-tb"/>
    </style:style>
    <style:style style:name="Table1.B7" style:family="table-cell">
      <style:table-cell-properties style:vertical-align="bottom" fo:padding-left="0.191cm" fo:padding-right="0.191cm" fo:padding-top="0cm" fo:padding-bottom="0cm" fo:border-left="none" fo:border-right="none" fo:border-top="none" fo:border-bottom="1pt solid #e40046" style:writing-mode="lr-tb"/>
    </style:style>
    <style:style style:name="Table1.B8" style:family="table-cell">
      <style:table-cell-properties style:vertical-align="bottom" fo:padding-left="0.191cm" fo:padding-right="0.191cm" fo:padding-top="0cm" fo:padding-bottom="0cm" fo:border-left="none" fo:border-right="none" fo:border-top="1pt solid #e40046" fo:border-bottom="none" style:writing-mode="lr-tb"/>
    </style:style>
    <style:style style:name="Table1.B9" style:family="table-cell">
      <style:table-cell-properties style:vertical-align="middle" fo:padding-left="0.191cm" fo:padding-right="0.191cm" fo:padding-top="0cm" fo:padding-bottom="0cm" fo:border-left="none" fo:border-right="none" fo:border-top="none" fo:border-bottom="1pt solid #e40046" style:writing-mode="lr-tb"/>
    </style:style>
    <style:style style:name="Table1.C10" style:family="table-cell">
      <style:table-cell-properties fo:padding-left="0.191cm" fo:padding-right="0.191cm" fo:padding-top="0cm" fo:padding-bottom="0cm" fo:border-left="none" fo:border-right="none" fo:border-top="1pt solid #e40046" fo:border-bottom="none" style:writing-mode="lr-tb"/>
    </style:style>
    <style:style style:name="P1" style:family="paragraph">
      <loext:graphic-properties draw:fill="none"/>
      <style:paragraph-properties fo:text-align="start"/>
      <style:text-properties fo:font-size="18pt"/>
    </style:style>
    <style:style style:name="P2" style:family="paragraph" style:parent-style-name="Standard">
      <style:paragraph-properties fo:margin-top="0cm" fo:margin-bottom="0cm" style:contextual-spacing="false" fo:line-height="100%" fo:text-align="center" style:justify-single-word="false"/>
    </style:style>
    <style:style style:name="P3" style:family="paragraph">
      <loext:graphic-properties draw:fill="solid" draw:fill-color="#767a7d"/>
      <style:paragraph-properties fo:text-align="start"/>
    </style:style>
    <style:style style:name="P4" style:family="paragraph" style:parent-style-name="Standard">
      <style:paragraph-properties fo:margin-top="0cm" fo:margin-bottom="0cm" style:contextual-spacing="false" fo:text-align="center" style:justify-single-word="false"/>
    </style:style>
    <style:style style:name="P5" style:family="paragraph">
      <loext:graphic-properties draw:fill="solid" draw:fill-color="#e90649"/>
      <style:paragraph-properties fo:text-align="start"/>
    </style:style>
    <style:style style:name="P6" style:family="paragraph" style:parent-style-name="Standard">
      <style:paragraph-properties fo:text-align="end" style:justify-single-word="false"/>
    </style:style>
    <style:style style:name="P7" style:family="paragraph">
      <loext:graphic-properties draw:fill="none"/>
      <style:paragraph-properties fo:text-align="start"/>
    </style:style>
    <style:style style:name="P8" style:family="paragraph" style:parent-style-name="Standard">
      <style:text-properties fo:font-size="6pt" style:font-size-asian="6pt" style:font-size-complex="6pt"/>
    </style:style>
    <style:style style:name="P9" style:family="paragraph" style:parent-style-name="List_20_Paragraph">
      <style:paragraph-properties fo:margin-left="1.884cm"/>
      <style:text-properties fo:font-variant="normal" fo:text-transform="none" style:use-window-font-color="true" loext:opacity="0%" style:font-name="Calibri" fo:font-size="9pt" fo:font-weight="normal" style:font-size-asian="9pt" style:font-weight-asian="normal" style:font-size-complex="9pt"/>
    </style:style>
    <style:style style:name="P10"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style:letter-kerning="false" style:font-name-asian="Calibri2" style:font-size-asian="11pt" style:language-asian="en" style:country-asian="US" style:font-name-complex="Arial1" style:font-size-complex="11pt" style:language-complex="ar" style:country-complex="SA"/>
    </style:style>
    <style:style style:name="P11" style:family="paragraph">
      <loext:graphic-properties draw:fill="solid" draw:fill-color="#e90649"/>
      <style:paragraph-properties fo:text-align="start" style:writing-mode="lr-tb"/>
      <style:text-properties fo:font-size="11pt"/>
    </style:style>
    <style:style style:name="P12" style:family="paragraph">
      <loext:graphic-properties draw:fill="solid" draw:fill-color="#f1f1f2"/>
      <style:paragraph-properties fo:text-align="start" style:writing-mode="lr-tb"/>
      <style:text-properties fo:font-size="11pt"/>
    </style:style>
    <style:style style:name="P13" style:family="paragraph" style:parent-style-name="List_20_Paragraph">
      <style:paragraph-properties fo:margin-top="0cm" fo:margin-bottom="0cm" style:contextual-spacing="true" fo:line-height="100%" fo:text-align="start" style:justify-single-word="false" fo:orphans="2" fo:widows="2"/>
      <style:text-properties style:font-name="Calibri" fo:font-size="11pt" fo:language="fr" fo:country="FR" style:letter-kerning="false" style:font-name-asian="Calibri2" style:font-size-asian="11pt" style:language-asian="en" style:country-asian="US" style:font-name-complex="Arial1" style:font-size-complex="11pt" style:language-complex="ar" style:country-complex="SA"/>
    </style:style>
    <style:style style:name="P14" style:family="paragraph" style:parent-style-name="List_20_Paragraph" style:list-style-name="WWNum1">
      <style:paragraph-properties fo:margin-top="0cm" fo:margin-bottom="0cm" style:contextual-spacing="true" fo:line-height="200%" fo:text-align="start" style:justify-single-word="false" fo:orphans="2" fo:widows="2"/>
      <style:text-properties style:font-name="Calibri1" fo:font-size="11pt" fo:language="fr" fo:country="FR" style:letter-kerning="false" style:font-name-asian="Calibri2" style:font-size-asian="11pt" style:language-asian="en" style:country-asian="US" style:font-name-complex="Arial1" style:font-size-complex="11pt" style:language-complex="ar" style:country-complex="SA"/>
    </style:style>
    <style:style style:name="P15" style:family="paragraph" style:parent-style-name="List_20_Paragraph" style:list-style-name="WWNum5">
      <style:paragraph-properties fo:margin-top="0cm" fo:margin-bottom="0cm" style:contextual-spacing="true" fo:line-height="200%" fo:text-align="start" style:justify-single-word="false" fo:orphans="2" fo:widows="2"/>
      <style:text-properties style:font-name="Calibri1" fo:font-size="11pt" fo:language="fr" fo:country="FR" officeooo:paragraph-rsid="002de597" style:letter-kerning="false" style:font-name-asian="Calibri2" style:font-size-asian="11pt" style:language-asian="en" style:country-asian="US" style:font-name-complex="Arial1" style:font-size-complex="11pt" style:language-complex="ar" style:country-complex="SA"/>
    </style:style>
    <style:style style:name="P16" style:family="paragraph" style:parent-style-name="List_20_Paragraph" style:list-style-name="WWNum5">
      <style:paragraph-properties fo:margin-top="0cm" fo:margin-bottom="0cm" style:contextual-spacing="true" fo:line-height="200%" fo:text-align="start" style:justify-single-word="false" fo:orphans="2" fo:widows="2"/>
      <style:text-properties style:font-name="Calibri1" fo:font-size="11pt" fo:language="fr" fo:country="FR" style:letter-kerning="false" style:font-name-asian="Calibri2" style:font-size-asian="11pt" style:language-asian="en" style:country-asian="US" style:font-name-complex="Arial1" style:font-size-complex="11pt" style:language-complex="ar" style:country-complex="SA"/>
    </style:style>
    <style:style style:name="P17"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officeooo:paragraph-rsid="0027eebc" style:letter-kerning="false" style:font-name-asian="Calibri2" style:font-size-asian="11pt" style:language-asian="en" style:country-asian="US" style:font-name-complex="Arial1" style:font-size-complex="11pt" style:language-complex="ar" style:country-complex="SA"/>
    </style:style>
    <style:style style:name="P18" style:family="paragraph" style:parent-style-name="List_20_Paragraph">
      <style:paragraph-properties fo:margin-left="1.332cm" fo:margin-top="0cm" fo:margin-bottom="0.282cm" style:contextual-spacing="true" fo:line-height="108%" fo:text-align="start" style:justify-single-word="false" fo:orphans="2" fo:widows="2" fo:padding="0cm" fo:border="none" style:shadow="none" style:join-border="false"/>
      <style:text-properties style:font-name="Calibri1" fo:font-size="11pt" fo:language="fr" fo:country="FR" fo:font-weight="normal" style:letter-kerning="false" style:font-name-asian="Calibri2" style:font-size-asian="11pt" style:language-asian="en" style:country-asian="US" style:font-weight-asian="normal" style:font-name-complex="Arial1" style:font-size-complex="11pt" style:language-complex="ar" style:country-complex="SA"/>
    </style:style>
    <style:style style:name="P19" style:family="paragraph" style:parent-style-name="List_20_Paragraph" style:list-style-name="WWNum7">
      <style:paragraph-properties fo:margin-left="1.332cm" fo:margin-top="0cm" fo:margin-bottom="0.282cm" style:contextual-spacing="true" fo:line-height="108%" fo:text-align="start" style:justify-single-word="false" fo:orphans="2" fo:widows="2" fo:text-indent="-0.635cm" style:auto-text-indent="false" fo:padding="0cm" fo:border="none" style:shadow="none" style:join-border="false"/>
      <style:text-properties style:font-name="Calibri1" fo:font-size="11pt" fo:language="fr" fo:country="FR" style:letter-kerning="false" style:font-name-asian="Calibri2" style:font-size-asian="11pt" style:language-asian="en" style:country-asian="US" style:font-name-complex="Arial1" style:font-size-complex="11pt" style:language-complex="ar" style:country-complex="SA"/>
    </style:style>
    <style:style style:name="P20" style:family="paragraph" style:parent-style-name="List_20_Paragraph">
      <style:paragraph-properties fo:margin-left="0cm" fo:margin-top="0cm" fo:margin-bottom="0cm" style:contextual-spacing="true" fo:line-height="200%" fo:text-align="start" style:justify-single-word="false" fo:orphans="2" fo:widows="2" fo:text-indent="0cm" style:auto-text-indent="false"/>
      <style:text-properties style:font-name="Calibri1" fo:font-size="11pt" fo:language="fr" fo:country="FR" style:letter-kerning="false" style:font-name-asian="Calibri2" style:font-size-asian="11pt" style:language-asian="en" style:country-asian="US" style:font-name-complex="Arial1" style:font-size-complex="11pt" style:language-complex="ar" style:country-complex="SA"/>
    </style:style>
    <style:style style:name="P21" style:family="paragraph" style:parent-style-name="List_20_Paragraph" style:list-style-name="WWNum5">
      <style:paragraph-properties fo:margin-top="0cm" fo:margin-bottom="0cm" style:contextual-spacing="true" fo:line-height="100%" fo:text-align="start" style:justify-single-word="false" fo:orphans="2" fo:widows="2"/>
      <style:text-properties style:font-name="Calibri1" fo:font-size="11pt" fo:language="fr" fo:country="FR" style:letter-kerning="false" style:font-name-asian="Calibri2" style:font-size-asian="11pt" style:language-asian="en" style:country-asian="US" style:font-name-complex="Arial1" style:font-size-complex="11pt" style:language-complex="ar" style:country-complex="SA"/>
    </style:style>
    <style:style style:name="P22" style:family="paragraph">
      <loext:graphic-properties draw:fill="solid" draw:fill-color="#e90649"/>
      <style:paragraph-properties fo:text-align="start"/>
      <style:text-properties fo:font-size="18pt"/>
    </style:style>
    <style:style style:name="P23" style:family="paragraph" style:parent-style-name="List_20_Paragraph">
      <style:paragraph-properties fo:margin-left="1.386cm" fo:margin-top="0cm" fo:margin-bottom="0cm" style:contextual-spacing="true" fo:line-height="200%" fo:text-align="start" style:justify-single-word="false" fo:orphans="2" fo:widows="2"/>
      <style:text-properties style:font-name="Calibri1" fo:font-size="11pt" fo:language="fr" fo:country="FR" style:letter-kerning="false" style:font-name-asian="Calibri2" style:font-size-asian="11pt" style:language-asian="en" style:country-asian="US" style:font-name-complex="Arial1" style:font-size-complex="11pt" style:language-complex="ar" style:country-complex="SA"/>
    </style:style>
    <style:style style:name="P24" style:family="paragraph" style:parent-style-name="List_20_Paragraph" style:list-style-name="WWNum12">
      <style:paragraph-properties fo:margin-top="0cm" fo:margin-bottom="0cm" style:contextual-spacing="true" fo:line-height="200%" fo:text-align="start" style:justify-single-word="false" fo:orphans="2" fo:widows="2"/>
      <style:text-properties style:font-name="Calibri1" fo:font-size="11pt" fo:language="fr" fo:country="FR" style:letter-kerning="false" style:font-name-asian="Calibri2" style:font-size-asian="11pt" style:language-asian="en" style:country-asian="US" style:font-name-complex="Arial1" style:font-size-complex="11pt" style:language-complex="ar" style:country-complex="SA"/>
    </style:style>
    <style:style style:name="P25" style:family="paragraph" style:parent-style-name="List_20_Paragraph">
      <style:paragraph-properties fo:margin-left="1.884cm"/>
      <style:text-properties fo:font-variant="normal" fo:text-transform="none" style:use-window-font-color="true" loext:opacity="0%" style:font-name="Calibri" fo:font-size="6pt" fo:font-weight="normal" style:font-size-asian="6pt" style:font-weight-asian="normal" style:font-size-complex="6pt"/>
    </style:style>
    <style:style style:name="P26" style:family="paragraph" style:parent-style-name="Titre_20_client">
      <style:paragraph-properties fo:padding-left="0cm" fo:padding-right="0cm" fo:padding-top="0cm" fo:padding-bottom="0.035cm" fo:border-left="none" fo:border-right="none" fo:border-top="none" fo:border-bottom="0.99pt solid #e40649"/>
    </style:style>
    <style:style style:name="P27" style:family="paragraph" style:parent-style-name="Footer">
      <style:paragraph-properties fo:margin-top="0cm" fo:margin-bottom="0cm" style:contextual-spacing="false" fo:text-align="end" style:justify-single-word="false" fo:orphans="2" fo:widows="2"/>
      <style:text-properties style:font-name="Calibri1" fo:font-size="11pt" fo:language="fr" fo:country="FR" style:letter-kerning="false" style:font-name-asian="Calibri2" style:font-size-asian="11pt" style:language-asian="en" style:country-asian="US" style:font-name-complex="Arial1" style:font-size-complex="11pt" style:language-complex="ar" style:country-complex="SA"/>
    </style:style>
    <style:style style:name="P28" style:family="paragraph" style:parent-style-name="Footer">
      <style:paragraph-properties fo:margin-top="0cm" fo:margin-bottom="0cm" style:contextual-spacing="false" fo:text-align="start" style:justify-single-word="false" fo:orphans="2" fo:widows="2"/>
      <style:text-properties style:font-name="Calibri1" fo:font-size="11pt" fo:language="fr" fo:country="FR" style:letter-kerning="false" style:font-name-asian="Calibri2" style:font-size-asian="11pt" style:language-asian="en" style:country-asian="US" style:font-name-complex="Arial1" style:font-size-complex="11pt" style:language-complex="ar" style:country-complex="SA"/>
    </style:style>
    <style:style style:name="P29" style:family="paragraph">
      <style:paragraph-properties fo:margin-top="0cm" fo:margin-bottom="0cm"/>
    </style:style>
    <style:style style:name="P30" style:family="paragraph">
      <loext:graphic-properties draw:fill="solid" draw:fill-color="#e40649"/>
      <style:paragraph-properties fo:text-align="start"/>
      <style:text-properties fo:color="#ffffff" loext:opacity="100%" fo:font-size="18pt"/>
    </style:style>
    <style:style style:name="P31" style:family="paragraph">
      <loext:graphic-properties draw:fill="solid" draw:fill-color="#f1f1f2"/>
      <style:paragraph-properties fo:text-align="start"/>
      <style:text-properties fo:color="#ffffff" loext:opacity="100%" fo:font-size="18pt"/>
    </style:style>
    <style:style style:name="P32" style:family="paragraph" style:parent-style-name="List_20_Paragraph" style:list-style-name="WWNum9"/>
    <style:style style:name="P33" style:family="paragraph" style:parent-style-name="List_20_Paragraph" style:list-style-name="WWNum9">
      <style:text-properties officeooo:paragraph-rsid="0019798b"/>
    </style:style>
    <style:style style:name="P34" style:family="paragraph" style:parent-style-name="List_20_Paragraph" style:list-style-name="WWNum9">
      <style:text-properties officeooo:paragraph-rsid="001a11a7"/>
    </style:style>
    <style:style style:name="P35" style:family="paragraph" style:parent-style-name="List_20_Paragraph" style:list-style-name="WWNum9">
      <style:text-properties officeooo:paragraph-rsid="002895e9"/>
    </style:style>
    <style:style style:name="P36" style:family="paragraph" style:parent-style-name="List_20_Paragraph" style:list-style-name="WWNum9">
      <style:text-properties officeooo:paragraph-rsid="0027eebc"/>
    </style:style>
    <style:style style:name="P37" style:family="paragraph" style:parent-style-name="List_20_Paragraph" style:list-style-name="WWNum9">
      <style:text-properties officeooo:paragraph-rsid="0027ebcf"/>
    </style:style>
    <style:style style:name="P38" style:family="paragraph" style:parent-style-name="List_20_Paragraph" style:list-style-name="WWNum9">
      <style:paragraph-properties fo:margin-left="0cm" fo:text-indent="0cm" style:auto-text-indent="false"/>
    </style:style>
    <style:style style:name="P39" style:family="paragraph" style:parent-style-name="Standard">
      <style:paragraph-properties fo:break-before="page"/>
    </style:style>
    <style:style style:name="P40" style:family="paragraph" style:parent-style-name="Frame_20_contents">
      <style:paragraph-properties fo:margin-top="0cm" fo:margin-bottom="0cm" style:contextual-spacing="false"/>
      <style:text-properties officeooo:paragraph-rsid="001e3a55"/>
    </style:style>
    <style:style style:name="P41" style:family="paragraph">
      <loext:graphic-properties draw:fill="solid" draw:fill-color="#e90649"/>
      <style:paragraph-properties fo:text-align="start"/>
      <style:text-properties fo:color="#ffffff" loext:opacity="100%" fo:font-size="18pt"/>
    </style:style>
    <style:style style:name="P42" style:family="paragraph" style:parent-style-name="Standard">
      <style:text-properties fo:color="#e90649" loext:opacity="100%" style:font-name="Century Gothic" fo:font-size="10pt" fo:font-weight="bold" style:font-size-asian="10pt" style:font-weight-asian="bold" style:font-size-complex="10pt" style:font-weight-complex="bold"/>
    </style:style>
    <style:style style:name="P43" style:family="paragraph" style:parent-style-name="List_20_Paragraph" style:list-style-name="WWNum9">
      <style:text-properties officeooo:paragraph-rsid="001e3a55"/>
    </style:style>
    <style:style style:name="P44" style:family="paragraph" style:parent-style-name="List_20_Paragraph" style:list-style-name="WWNum9">
      <style:text-properties officeooo:paragraph-rsid="001e9d20"/>
    </style:style>
    <style:style style:name="P45" style:family="paragraph" style:parent-style-name="List_20_Paragraph" style:list-style-name="WWNum9">
      <style:paragraph-properties fo:margin-left="0cm" fo:text-indent="0cm" style:auto-text-indent="false"/>
      <style:text-properties officeooo:paragraph-rsid="001e9d20"/>
    </style:style>
    <style:style style:name="P46" style:family="paragraph" style:parent-style-name="List_20_Paragraph" style:list-style-name="WWNum9">
      <style:text-properties officeooo:paragraph-rsid="00204020"/>
    </style:style>
    <style:style style:name="P47" style:family="paragraph" style:parent-style-name="Standard">
      <style:paragraph-properties fo:text-align="center" style:justify-single-word="false"/>
    </style:style>
    <style:style style:name="P48" style:family="paragraph" style:parent-style-name="Frame_20_contents">
      <style:paragraph-properties fo:margin-top="0cm" fo:margin-bottom="0cm" style:contextual-spacing="false"/>
      <style:text-properties officeooo:paragraph-rsid="00204020"/>
    </style:style>
    <style:style style:name="P49" style:family="paragraph" style:parent-style-name="Frame_20_contents">
      <style:text-properties officeooo:paragraph-rsid="00204020"/>
    </style:style>
    <style:style style:name="P50" style:family="paragraph" style:parent-style-name="List_20_Paragraph" style:list-style-name="WWNum9">
      <style:text-properties officeooo:paragraph-rsid="00294e3b"/>
    </style:style>
    <style:style style:name="P51" style:family="paragraph" style:parent-style-name="Standard">
      <style:paragraph-properties fo:text-align="center" style:justify-single-word="false"/>
      <style:text-properties officeooo:paragraph-rsid="0020447b"/>
    </style:style>
    <style:style style:name="P52" style:family="paragraph" style:parent-style-name="Frame_20_contents">
      <style:paragraph-properties fo:margin-top="0cm" fo:margin-bottom="0cm" style:contextual-spacing="false"/>
      <style:text-properties officeooo:paragraph-rsid="0020447b"/>
    </style:style>
    <style:style style:name="P53" style:family="paragraph" style:parent-style-name="Frame_20_contents">
      <style:text-properties officeooo:paragraph-rsid="0020447b"/>
    </style:style>
    <style:style style:name="P54" style:family="paragraph" style:parent-style-name="List_20_Paragraph" style:list-style-name="WWNum9">
      <style:text-properties officeooo:paragraph-rsid="0020447b"/>
    </style:style>
    <style:style style:name="P55" style:family="paragraph" style:parent-style-name="List_20_Paragraph">
      <style:paragraph-properties fo:margin-left="0cm" fo:text-indent="0cm" style:auto-text-indent="false"/>
    </style:style>
    <style:style style:name="P56" style:family="paragraph" style:parent-style-name="List_20_Paragraph">
      <style:paragraph-properties fo:margin-left="0cm" fo:text-indent="0cm" style:auto-text-indent="false" fo:break-before="page"/>
    </style:style>
    <style:style style:name="P57" style:family="paragraph" style:parent-style-name="Frame_20_contents">
      <style:paragraph-properties fo:margin-top="0cm" fo:margin-bottom="0cm" style:contextual-spacing="false"/>
      <style:text-properties officeooo:paragraph-rsid="00220af8"/>
    </style:style>
    <style:style style:name="P58" style:family="paragraph" style:parent-style-name="List_20_Paragraph" style:list-style-name="WWNum9">
      <style:text-properties officeooo:paragraph-rsid="00220af8"/>
    </style:style>
    <style:style style:name="P59" style:family="paragraph" style:parent-style-name="Standard">
      <style:paragraph-properties fo:text-align="center" style:justify-single-word="false"/>
      <style:text-properties officeooo:paragraph-rsid="0029d5cd"/>
    </style:style>
    <style:style style:name="P60" style:family="paragraph" style:parent-style-name="Standard">
      <style:text-properties officeooo:paragraph-rsid="00239696"/>
    </style:style>
    <style:style style:name="P61" style:family="paragraph" style:parent-style-name="Frame_20_contents">
      <style:paragraph-properties fo:margin-top="0cm" fo:margin-bottom="0cm" style:contextual-spacing="false"/>
      <style:text-properties officeooo:paragraph-rsid="00240d5d"/>
    </style:style>
    <style:style style:name="P62" style:family="paragraph" style:parent-style-name="Standard">
      <style:text-properties fo:color="#e90649" loext:opacity="100%" style:font-name="Century Gothic" fo:font-size="10pt" fo:font-weight="bold" officeooo:paragraph-rsid="00239696" style:font-size-asian="10pt" style:font-weight-asian="bold" style:font-size-complex="10pt" style:font-weight-complex="bold"/>
    </style:style>
    <style:style style:name="P63" style:family="paragraph" style:parent-style-name="List_20_Paragraph" style:list-style-name="WWNum9">
      <style:text-properties officeooo:paragraph-rsid="00240d5d"/>
    </style:style>
    <style:style style:name="P64" style:family="paragraph" style:parent-style-name="List_20_Paragraph" style:list-style-name="WWNum9">
      <style:text-properties officeooo:paragraph-rsid="00239696"/>
    </style:style>
    <style:style style:name="P65" style:family="paragraph" style:parent-style-name="List_20_Paragraph" style:list-style-name="WWNum9">
      <style:text-properties officeooo:paragraph-rsid="0029d5cd"/>
    </style:style>
    <style:style style:name="P66" style:family="paragraph" style:parent-style-name="List_20_Paragraph">
      <style:text-properties officeooo:paragraph-rsid="0029d5cd"/>
    </style:style>
    <style:style style:name="P67" style:family="paragraph" style:parent-style-name="Standard">
      <style:text-properties officeooo:paragraph-rsid="0029d5cd"/>
    </style:style>
    <style:style style:name="P68" style:family="paragraph" style:parent-style-name="Standard">
      <style:text-properties fo:color="#e90649" loext:opacity="100%" style:font-name="Century Gothic" fo:font-size="10pt" fo:font-weight="bold" officeooo:paragraph-rsid="0029d5cd" style:font-size-asian="10pt" style:font-weight-asian="bold" style:font-size-complex="10pt" style:font-weight-complex="bold"/>
    </style:style>
    <style:style style:name="P69" style:family="paragraph" style:parent-style-name="List_20_Paragraph" style:list-style-name="WWNum9">
      <style:text-properties officeooo:paragraph-rsid="002b6285"/>
    </style:style>
    <style:style style:name="P70" style:family="paragraph" style:parent-style-name="List_20_Paragraph">
      <style:paragraph-properties fo:margin-left="0cm" fo:text-indent="0cm" style:auto-text-indent="false"/>
      <style:text-properties officeooo:paragraph-rsid="0029d5cd"/>
    </style:style>
    <style:style style:name="P71" style:family="paragraph" style:parent-style-name="Frame_20_contents">
      <style:paragraph-properties fo:text-align="center" style:justify-single-word="false"/>
    </style:style>
    <style:style style:name="T1" style:family="text">
      <style:text-properties fo:color="#ffffff" loext:opacity="100%" style:font-name="Century Gothic" fo:font-size="22pt" fo:font-weight="bold" style:font-size-asian="22pt" style:font-weight-asian="bold">
        <loext:char-complex-color loext:theme-type="light1" loext:color-type="theme"/>
      </style:text-properties>
    </style:style>
    <style:style style:name="T2" style:family="text">
      <style:text-properties officeooo:rsid="0025f400"/>
    </style:style>
    <style:style style:name="T3" style:family="text">
      <style:text-properties style:font-name="Century Gothic" fo:font-size="14pt" fo:font-weight="bold" style:font-size-asian="14pt" style:font-weight-asian="bold" style:font-size-complex="14pt"/>
    </style:style>
    <style:style style:name="T4" style:family="text">
      <style:text-properties fo:font-size="10pt" style:font-size-asian="10pt" style:font-size-complex="8pt"/>
    </style:style>
    <style:style style:name="T5" style:family="text">
      <style:text-properties fo:color="#767a7d" loext:opacity="100%" fo:font-size="10pt" style:font-size-asian="10pt" style:font-size-complex="10pt" style:font-weight-complex="bold"/>
    </style:style>
    <style:style style:name="T6" style:family="text">
      <style:text-properties fo:color="#767a7d" loext:opacity="100%" style:font-name="Century Gothic" fo:font-size="10pt" style:font-size-asian="10pt" style:font-size-complex="10pt" style:font-weight-complex="bold"/>
    </style:style>
    <style:style style:name="T7" style:family="text">
      <style:text-properties fo:color="#767a7d" loext:opacity="100%" fo:font-size="10pt" officeooo:rsid="003579af" style:font-size-asian="10pt" style:font-size-complex="10pt" style:font-weight-complex="bold"/>
    </style:style>
    <style:style style:name="T8" style:family="text">
      <style:text-properties fo:font-size="6pt" style:font-size-asian="6pt" style:font-size-complex="6pt"/>
    </style:style>
    <style:style style:name="T9" style:family="text">
      <style:text-properties fo:font-variant="normal" fo:text-transform="none" style:use-window-font-color="true" loext:opacity="0%" style:font-name="Calibri1" fo:font-size="9pt" fo:font-weight="normal" style:font-size-asian="9pt" style:font-weight-asian="normal" style:font-size-complex="9pt"/>
    </style:style>
    <style:style style:name="T10" style:family="text">
      <style:text-properties fo:letter-spacing="0.035cm" fo:font-weight="bold" style:font-weight-asian="bold" style:font-weight-complex="bold"/>
    </style:style>
    <style:style style:name="T11" style:family="text">
      <style:text-properties fo:color="#e90649" loext:opacity="100%" fo:font-size="14pt" fo:letter-spacing="0.035cm" fo:font-weight="bold" style:font-size-asian="14pt" style:font-weight-asian="bold" style:font-size-complex="14pt"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officeooo:rsid="0027eebc"/>
    </style:style>
    <style:style style:name="T15" style:family="text">
      <style:text-properties fo:language="fr" fo:country="FR"/>
    </style:style>
    <style:style style:name="T16" style:family="text">
      <style:text-properties fo:language="en" fo:country="US"/>
    </style:style>
    <style:style style:name="T17" style:family="text">
      <style:text-properties style:font-name="Calibri1" fo:font-size="11pt" style:font-size-asian="11pt" style:font-size-complex="11pt"/>
    </style:style>
    <style:style style:name="T18" style:family="text">
      <style:text-properties fo:font-variant="normal" fo:text-transform="none" style:use-window-font-color="true" loext:opacity="0%" fo:font-weight="normal" style:font-weight-asian="normal" style:font-weight-complex="normal"/>
    </style:style>
    <style:style style:name="T19" style:family="text">
      <style:text-properties officeooo:rsid="001781d1"/>
    </style:style>
    <style:style style:name="T20" style:family="text">
      <style:text-properties fo:color="#e90649" loext:opacity="100%" fo:font-size="14pt" fo:letter-spacing="0.035cm" fo:font-weight="bold" officeooo:rsid="0027eebc" style:font-size-asian="14pt" style:font-weight-asian="bold" style:font-size-complex="14pt" style:font-weight-complex="bold"/>
    </style:style>
    <style:style style:name="T21" style:family="text">
      <style:text-properties fo:font-weight="normal" style:font-weight-asian="normal"/>
    </style:style>
    <style:style style:name="T22" style:family="text">
      <style:text-properties fo:text-transform="uppercase" fo:color="#767a7d" loext:opacity="100%" style:font-name="Century Gothic" fo:font-size="10pt" fo:language="en" fo:country="US" style:font-size-asian="10pt" style:font-size-complex="10pt"/>
    </style:style>
    <style:style style:name="T23" style:family="text">
      <style:text-properties fo:language="en" fo:country="US" fo:font-weight="normal" style:font-weight-asian="normal" style:font-weight-complex="normal"/>
    </style:style>
    <style:style style:name="T24" style:family="text">
      <style:text-properties fo:letter-spacing="0.035cm"/>
    </style:style>
    <style:style style:name="T25" style:family="text">
      <style:text-properties fo:font-variant="normal" fo:text-transform="none" fo:color="#e90649" loext:opacity="100%" style:font-name="Calibri" fo:font-size="14pt" fo:letter-spacing="0.035cm" style:font-size-asian="14pt" style:font-size-complex="14pt" style:font-weight-complex="bold"/>
    </style:style>
    <style:style style:name="T26" style:family="text">
      <style:text-properties fo:font-variant="normal" fo:text-transform="none" style:use-window-font-color="true" loext:opacity="0%" style:font-name="Calibri1" fo:font-size="6pt" fo:font-weight="normal" style:font-size-asian="6pt" style:font-weight-asian="normal" style:font-size-complex="6pt"/>
    </style:style>
    <style:style style:name="T27" style:family="text">
      <style:text-properties fo:color="#767a7d" loext:opacity="100%" fo:font-size="16pt" style:font-size-asian="16pt" style:font-size-complex="16pt"/>
    </style:style>
    <style:style style:name="T28" style:family="text">
      <style:text-properties officeooo:rsid="001e9d20"/>
    </style:style>
    <style:style style:name="T29" style:family="text">
      <style:text-properties fo:color="#767a7d" loext:opacity="100%" style:font-name="Century Gothic" fo:font-size="10pt" style:font-size-asian="10pt" style:font-size-complex="10pt"/>
    </style:style>
    <style:style style:name="T30" style:family="text">
      <style:text-properties fo:color="#767a7d" loext:opacity="100%" style:font-name="Century Gothic" fo:font-size="10pt" officeooo:rsid="0016abb8" style:font-size-asian="10pt" style:font-size-complex="10pt"/>
    </style:style>
    <style:style style:name="T31" style:family="text">
      <style:text-properties fo:color="#f1f1f2" loext:opacity="100%" fo:font-size="10pt" fo:font-weight="bold" style:font-size-asian="10pt" style:font-weight-asian="bold"/>
    </style:style>
    <style:style style:name="T32" style:family="text">
      <style:text-properties fo:color="#e90649" loext:opacity="100%" style:font-name="Century Gothic" fo:font-size="10pt" fo:font-weight="bold" style:font-size-asian="10pt" style:font-weight-asian="bold" style:font-size-complex="10pt" style:font-weight-complex="bold"/>
    </style:style>
    <style:style style:name="T33" style:family="text">
      <style:text-properties fo:color="#e90649" loext:opacity="100%" style:font-name="Century Gothic" fo:font-size="10pt" fo:letter-spacing="0.035cm" fo:font-weight="bold" style:font-size-asian="10pt" style:font-weight-asian="bold" style:font-size-complex="10pt" style:font-weight-complex="bold"/>
    </style:style>
    <style:style style:name="T34" style:family="text">
      <style:text-properties officeooo:rsid="001786d2"/>
    </style:style>
    <style:style style:name="T35" style:family="text">
      <style:text-properties officeooo:rsid="001a11a7"/>
    </style:style>
    <style:style style:name="T36" style:family="text">
      <style:text-properties style:use-window-font-color="true" loext:opacity="0%" fo:font-size="8pt" style:font-size-asian="8pt" style:font-size-complex="8pt" style:font-weight-complex="bold"/>
    </style:style>
    <style:style style:name="T37" style:family="text">
      <style:text-properties officeooo:rsid="0019798b"/>
    </style:style>
    <style:style style:name="T38" style:family="text">
      <style:text-properties fo:font-size="8pt" fo:font-weight="bold" style:font-size-asian="8pt" style:font-weight-asian="bold" style:font-size-complex="8pt" style:font-weight-complex="bold"/>
    </style:style>
    <style:style style:name="T39" style:family="text">
      <style:text-properties officeooo:rsid="001b39d6"/>
    </style:style>
    <style:style style:name="T40" style:family="text">
      <style:text-properties fo:font-size="8pt" style:font-size-asian="8pt" style:font-size-complex="8pt" style:font-weight-complex="bold"/>
    </style:style>
    <style:style style:name="T41" style:family="text">
      <style:text-properties style:font-name="Century Gothic" officeooo:rsid="0019798b"/>
    </style:style>
    <style:style style:name="T42" style:family="text">
      <style:text-properties officeooo:rsid="002de65a"/>
    </style:style>
    <style:style style:name="T43" style:family="text">
      <style:text-properties style:font-name="Century Gothic" officeooo:rsid="0019798b" style:font-size-complex="8pt" style:font-weight-complex="bold"/>
    </style:style>
    <style:style style:name="T44" style:family="text">
      <style:text-properties style:font-name="Century Gothic" officeooo:rsid="002895e9" style:font-size-complex="8pt" style:font-weight-complex="bold"/>
    </style:style>
    <style:style style:name="T45" style:family="text">
      <style:text-properties officeooo:rsid="002895e9" style:font-size-complex="8pt" style:font-weight-complex="bold"/>
    </style:style>
    <style:style style:name="T46" style:family="text">
      <style:text-properties officeooo:rsid="001b39d6" style:font-size-complex="8pt" style:font-weight-complex="bold"/>
    </style:style>
    <style:style style:name="T47" style:family="text">
      <style:text-properties officeooo:rsid="0027ebcf"/>
    </style:style>
    <style:style style:name="T48" style:family="text">
      <style:text-properties fo:font-weight="bold" officeooo:rsid="001be919" style:font-weight-asian="bold" style:font-weight-complex="normal"/>
    </style:style>
    <style:style style:name="T49" style:family="text">
      <style:text-properties fo:color="#767a7d" loext:opacity="100%" fo:font-size="16pt" officeooo:rsid="001be919" style:font-size-asian="16pt" style:font-size-complex="16pt"/>
    </style:style>
    <style:style style:name="T50" style:family="text">
      <style:text-properties fo:color="#767a7d" loext:opacity="100%" style:font-name="Century Gothic" fo:font-size="10pt" officeooo:rsid="001b39d6" style:font-size-asian="10pt" style:font-size-complex="10pt"/>
    </style:style>
    <style:style style:name="T51" style:family="text">
      <style:text-properties fo:color="#f1f1f2" loext:opacity="100%" fo:font-size="10pt" fo:font-weight="bold" style:font-size-asian="10pt" style:font-weight-asian="bold"/>
    </style:style>
    <style:style style:name="T52" style:family="text">
      <style:text-properties fo:color="#f1f1f2" loext:opacity="100%" fo:font-size="10pt" fo:font-weight="bold" officeooo:rsid="001e3a55" style:font-size-asian="10pt" style:font-weight-asian="bold"/>
    </style:style>
    <style:style style:name="T53" style:family="text">
      <style:text-properties fo:color="#f1f1f2" loext:opacity="100%" fo:font-size="10pt" fo:font-weight="bold" officeooo:rsid="00239696" style:font-size-asian="10pt" style:font-weight-asian="bold"/>
    </style:style>
    <style:style style:name="T54" style:family="text">
      <style:text-properties officeooo:rsid="001e3a55"/>
    </style:style>
    <style:style style:name="T55" style:family="text">
      <style:text-properties officeooo:rsid="00204020"/>
    </style:style>
    <style:style style:name="T56" style:family="text">
      <style:text-properties officeooo:rsid="00294e3b"/>
    </style:style>
    <style:style style:name="T57" style:family="text">
      <style:text-properties fo:font-size="8pt" fo:font-weight="bold" officeooo:rsid="001e9d20" style:font-size-asian="8pt" style:font-weight-asian="bold" style:font-size-complex="8pt" style:font-weight-complex="bold"/>
    </style:style>
    <style:style style:name="T58" style:family="text">
      <style:text-properties officeooo:rsid="0020447b"/>
    </style:style>
    <style:style style:name="T59" style:family="text">
      <style:text-properties fo:color="#f1f1f2" loext:opacity="100%" fo:font-size="10pt" fo:font-weight="bold" officeooo:rsid="00204020" style:font-size-asian="10pt" style:font-weight-asian="bold"/>
    </style:style>
    <style:style style:name="T60" style:family="text">
      <style:text-properties fo:letter-spacing="0.035cm" officeooo:rsid="00204020" style:font-size-complex="10pt" style:font-weight-complex="bold"/>
    </style:style>
    <style:style style:name="T61" style:family="text">
      <style:text-properties officeooo:rsid="002fcfc2"/>
    </style:style>
    <style:style style:name="T62" style:family="text">
      <style:text-properties fo:font-size="8pt" fo:font-weight="bold" officeooo:rsid="00204020" style:font-size-asian="8pt" style:font-weight-asian="bold" style:font-size-complex="8pt" style:font-weight-complex="bold"/>
    </style:style>
    <style:style style:name="T63" style:family="text">
      <style:text-properties fo:color="#f1f1f2" loext:opacity="100%" fo:font-size="10pt" fo:font-weight="bold" officeooo:rsid="0020447b" style:font-size-asian="10pt" style:font-weight-asian="bold"/>
    </style:style>
    <style:style style:name="T64" style:family="text">
      <style:text-properties fo:letter-spacing="0.035cm" officeooo:rsid="0020447b" style:font-size-complex="10pt" style:font-weight-complex="bold"/>
    </style:style>
    <style:style style:name="T65" style:family="text">
      <style:text-properties officeooo:rsid="0030ac91"/>
    </style:style>
    <style:style style:name="T66" style:family="text">
      <style:text-properties officeooo:rsid="00220af8"/>
    </style:style>
    <style:style style:name="T67" style:family="text">
      <style:text-properties fo:color="#f1f1f2" loext:opacity="100%" fo:font-size="10pt" fo:font-weight="bold" officeooo:rsid="00220af8" style:font-size-asian="10pt" style:font-weight-asian="bold"/>
    </style:style>
    <style:style style:name="T68" style:family="text">
      <style:text-properties fo:color="#f1f1f2" loext:opacity="100%" fo:font-size="10pt" fo:font-weight="bold" officeooo:rsid="0027516a" style:font-size-asian="10pt" style:font-weight-asian="bold"/>
    </style:style>
    <style:style style:name="T69" style:family="text">
      <style:text-properties fo:font-size="8pt" fo:font-weight="bold" officeooo:rsid="00220af8" style:font-size-asian="8pt" style:font-weight-asian="bold" style:font-size-complex="8pt" style:font-weight-complex="bold"/>
    </style:style>
    <style:style style:name="T70" style:family="text">
      <style:text-properties officeooo:rsid="0029d5cd"/>
    </style:style>
    <style:style style:name="T71" style:family="text">
      <style:text-properties fo:color="#f1f1f2" loext:opacity="100%" fo:font-size="10pt" fo:font-weight="bold" officeooo:rsid="00240d5d" style:font-size-asian="10pt" style:font-weight-asian="bold"/>
    </style:style>
    <style:style style:name="T72" style:family="text">
      <style:text-properties fo:color="#f1f1f2" loext:opacity="100%" fo:font-size="10pt" fo:font-weight="bold" officeooo:rsid="0029d5cd" style:font-size-asian="10pt" style:font-weight-asian="bold"/>
    </style:style>
    <style:style style:name="T73" style:family="text">
      <style:text-properties fo:letter-spacing="0.035cm" officeooo:rsid="00240d5d" style:font-size-complex="10pt" style:font-weight-complex="bold"/>
    </style:style>
    <style:style style:name="T74" style:family="text">
      <style:text-properties fo:letter-spacing="0.035cm" officeooo:rsid="0029d5cd" style:font-size-complex="10pt" style:font-weight-complex="bold"/>
    </style:style>
    <style:style style:name="T75" style:family="text">
      <style:text-properties officeooo:rsid="00240d5d"/>
    </style:style>
    <style:style style:name="T76" style:family="text">
      <style:text-properties officeooo:rsid="0024ec97"/>
    </style:style>
    <style:style style:name="T77" style:family="text">
      <style:text-properties officeooo:rsid="002c876f"/>
    </style:style>
    <style:style style:name="T78" style:family="text">
      <style:text-properties officeooo:rsid="00324b6b"/>
    </style:style>
    <style:style style:name="T79" style:family="text">
      <style:text-properties officeooo:rsid="002b6285"/>
    </style:style>
    <style:style style:name="T80" style:family="text">
      <style:text-properties officeooo:rsid="002bcbc6"/>
    </style:style>
    <style:style style:name="T81" style:family="text">
      <style:text-properties fo:font-size="14pt" fo:font-weight="bold" style:font-size-asian="14pt" style:font-weight-asian="bold"/>
    </style:style>
    <style:style style:name="T82" style:family="text">
      <style:text-properties fo:color="#ffffff" loext:opacity="100%" fo:font-size="14pt" fo:font-weight="bold" style:font-size-asian="14pt" style:font-weight-asian="bold"/>
    </style:style>
    <style:style style:name="fr1" style:family="graphic" style:parent-style-name="Frame">
      <style:graphic-properties fo:margin-left="0.249cm" fo:margin-right="0.249cm" fo:margin-top="0cm" fo:margin-bottom="0cm" style:vertical-pos="from-top" style:vertical-rel="page" style:horizontal-pos="center" style:horizontal-rel="page-content" draw:opacity="0%" fo:padding="0cm" fo:border="none"/>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style:flow-with-text="true" draw:wrap-influence-on-position="once-concurrent" loext:allow-overlap="true" loext:decorative="false"/>
    </style:style>
    <style:style style:name="gr1" style:family="graphic">
      <style:graphic-properties style:writing-mode="lr-tb"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writing-mode="lr-tb" loext:decorative="false" style:run-through="foreground"/>
    </style:style>
    <style:style style:name="gr3"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run-through="foreground"/>
    </style:style>
    <style:style style:name="gr4" style:family="graphic" style:parent-style-name="Frame">
      <style:graphic-properties draw:stroke="none" svg:stroke-width="0.018cm" draw:fill="solid" draw:fill-color="#767a7d" draw:textarea-vertical-align="middle" draw:auto-grow-height="false" fo:min-height="1.792cm" fo:min-width="14.425cm" fo:padding-top="0.127cm" fo:padding-bottom="0.127cm" fo:padding-left="0.254cm" fo:padding-right="0.254cm" fo:wrap-option="wrap" loext:decorative="false" style:run-through="foreground"/>
    </style:style>
    <style:style style:name="gr5" style:family="graphic" style:parent-style-name="Frame">
      <style:graphic-properties draw:stroke="none" svg:stroke-width="0.035cm" draw:stroke-linejoin="miter" svg:stroke-linecap="butt" draw:fill="solid" draw:fill-color="#e90649" draw:textarea-vertical-align="middle" draw:auto-grow-height="false" fo:min-height="0.718cm" fo:min-width="2.122cm" fo:padding-top="0.127cm" fo:padding-bottom="0.127cm" fo:padding-left="0.254cm" fo:padding-right="0.254cm" fo:wrap-option="wrap" loext:decorative="false" style:run-through="foreground"/>
    </style:style>
    <style:style style:name="gr6" style:family="graphic" style:parent-style-name="Frame">
      <style:graphic-properties draw:stroke="none" svg:stroke-width="0.035cm" draw:stroke-linejoin="miter" svg:stroke-linecap="butt" draw:fill="none" loext:fill-use-slide-background="false" draw:textarea-vertical-align="middle" draw:auto-grow-height="false" fo:min-height="1.473cm" fo:min-width="5.967cm" fo:padding-top="0.127cm" fo:padding-bottom="0.127cm" fo:padding-left="0.254cm" fo:padding-right="0.254cm" fo:wrap-option="wrap" loext:decorative="false" style:run-through="foreground"/>
    </style:style>
    <style:style style:name="gr7" style:family="graphic">
      <style:graphic-properties style:writing-mode="lr-tb" loext:decorative="false" fo:margin-left="0cm" fo:margin-right="0cm" fo:margin-top="0cm" fo:margin-bottom="0.018cm" style:run-through="foreground" style:vertical-pos="top" style:vertical-rel="baseline" style:horizontal-pos="from-left" style:horizontal-rel="paragraph" draw:wrap-influence-on-position="once-concurrent" loext:allow-overlap="true" style:flow-with-text="false"/>
    </style:style>
    <style:style style:name="gr8" style:family="graphic">
      <style:graphic-properties draw:stroke="none" svg:stroke-width="0.035cm" draw:stroke-linejoin="miter" svg:stroke-linecap="butt" draw:fill="solid" draw:fill-color="#e90649" draw:textarea-horizontal-align="justify" draw:textarea-vertical-align="middle" draw:auto-grow-height="false" draw:fit-to-size="false" style:shrink-to-fit="false" fo:min-height="0.709cm" fo:min-width="0.48cm" fo:padding-top="0.127cm" fo:padding-bottom="0.127cm" fo:padding-left="0.254cm" fo:padding-right="0.254cm" fo:wrap-option="wrap" style:writing-mode="lr-tb" loext:decorative="false" style:run-through="foreground">
        <style:columns fo:column-count="1" fo:column-gap="0cm">
          <style:column style:rel-width="65535*" fo:start-indent="0cm" fo:end-indent="0cm"/>
        </style:columns>
      </style:graphic-properties>
      <style:paragraph-properties style:writing-mode="lr-tb"/>
    </style:style>
    <style:style style:name="gr9" style:family="graphic">
      <style:graphic-properties draw:stroke="none" svg:stroke-width="0.026cm" draw:stroke-linejoin="round" draw:fill="solid" draw:fill-color="#f1f1f2" draw:textarea-horizontal-align="justify" draw:textarea-vertical-align="top" draw:auto-grow-height="false" draw:fit-to-size="false" style:shrink-to-fit="false" fo:min-height="0.413cm" fo:min-width="0.464cm" fo:padding-top="0.127cm" fo:padding-bottom="0.127cm" fo:padding-left="0.254cm" fo:padding-right="0.254cm" fo:wrap-option="wrap" style:writing-mode="lr-tb" loext:decorative="false" style:run-through="foreground">
        <style:columns fo:column-count="1" fo:column-gap="0cm">
          <style:column style:rel-width="65535*" fo:start-indent="0cm" fo:end-indent="0cm"/>
        </style:columns>
      </style:graphic-properties>
      <style:paragraph-properties style:writing-mode="lr-tb"/>
    </style:style>
    <style:style style:name="gr10" style:family="graphic">
      <style:graphic-properties style:writing-mode="lr-tb" loext:decorative="fals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11" style:family="graphic">
      <style:graphic-properties draw:stroke="none" svg:stroke-width="0.035cm" draw:stroke-linejoin="miter" svg:stroke-linecap="butt" draw:fill="solid" draw:fill-color="#e90649" draw:textarea-horizontal-align="justify" draw:textarea-vertical-align="middle" draw:auto-grow-height="false" draw:fit-to-size="false" style:shrink-to-fit="false" fo:min-height="0.737cm" fo:min-width="0.48cm" fo:padding-top="0.127cm" fo:padding-bottom="0.127cm" fo:padding-left="0.254cm" fo:padding-right="0.254cm" fo:wrap-option="wrap" style:writing-mode="lr-tb" loext:decorative="false" style:run-through="foreground">
        <style:columns fo:column-count="1" fo:column-gap="0cm">
          <style:column style:rel-width="65535*" fo:start-indent="0cm" fo:end-indent="0cm"/>
        </style:columns>
      </style:graphic-properties>
      <style:paragraph-properties style:writing-mode="lr-tb"/>
    </style:style>
    <style:style style:name="gr12" style:family="graphic">
      <style:graphic-properties draw:stroke="none" svg:stroke-width="0.026cm" draw:stroke-linejoin="round" draw:fill="solid" draw:fill-color="#f1f1f2" draw:textarea-horizontal-align="justify" draw:textarea-vertical-align="top" draw:auto-grow-height="false" draw:fit-to-size="false" style:shrink-to-fit="false" fo:min-height="0.529cm" fo:min-width="0.34cm" fo:padding-top="0.127cm" fo:padding-bottom="0.127cm" fo:padding-left="0.254cm" fo:padding-right="0.254cm" fo:wrap-option="wrap" style:writing-mode="lr-tb" loext:decorative="false" style:run-through="foreground">
        <style:columns fo:column-count="1" fo:column-gap="0cm">
          <style:column style:rel-width="65535*" fo:start-indent="0cm" fo:end-indent="0cm"/>
        </style:columns>
      </style:graphic-properties>
      <style:paragraph-properties style:writing-mode="lr-tb"/>
    </style:style>
    <style:style style:name="gr13" style:family="graphic">
      <style:graphic-properties draw:stroke="none" svg:stroke-width="0cm" draw:stroke-linejoin="round" draw:fill="solid" draw:fill-color="#f1f1f2" draw:textarea-horizontal-align="justify" draw:textarea-vertical-align="top" draw:auto-grow-height="false" draw:fit-to-size="false" style:shrink-to-fit="false" fo:min-height="0.612cm" fo:min-width="0.358cm" fo:padding-top="0.127cm" fo:padding-bottom="0.127cm" fo:padding-left="0.254cm" fo:padding-right="0.254cm" fo:wrap-option="wrap" style:writing-mode="lr-tb" loext:decorative="false" style:run-through="foreground">
        <style:columns fo:column-count="1" fo:column-gap="0cm">
          <style:column style:rel-width="65535*" fo:start-indent="0cm" fo:end-indent="0cm"/>
        </style:columns>
      </style:graphic-properties>
      <style:paragraph-properties style:writing-mode="lr-tb"/>
    </style:style>
    <style:style style:name="gr14" style:family="graphic">
      <style:graphic-properties draw:stroke="none" svg:stroke-width="0.035cm" draw:stroke-linejoin="miter" svg:stroke-linecap="butt" draw:fill="solid" draw:fill-color="#e90649" draw:textarea-vertical-align="top" draw:auto-grow-height="false" fo:min-height="0.713cm" fo:min-width="0.487cm" fo:padding-top="0.125cm" fo:padding-bottom="0.125cm" fo:padding-left="0.25cm" fo:padding-right="0.25cm" fo:wrap-option="wrap" loext:decorative="false" fo:margin-left="0cm" fo:margin-right="0cm" fo:margin-top="0cm" fo:margin-bottom="0.018cm" style:run-through="foreground" style:vertical-pos="top" style:vertical-rel="baseline" style:horizontal-pos="from-left" style:horizontal-rel="paragraph" draw:wrap-influence-on-position="once-concurrent" loext:allow-overlap="true" style:flow-with-text="false"/>
    </style:style>
    <style:style style:name="gr15" style:family="graphic">
      <style:graphic-properties draw:stroke="none" svg:stroke-width="0.035cm" draw:stroke-linejoin="miter" svg:stroke-linecap="butt" draw:fill="solid" draw:fill-color="#e40649" draw:textarea-vertical-align="middle" draw:auto-grow-height="false" fo:min-height="0.753cm" fo:min-width="20.502cm" fo:padding-top="0.127cm" fo:padding-bottom="0.127cm" fo:padding-left="0.254cm" fo:padding-right="0.254cm" fo:wrap-option="wrap" loext:decorative="false"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parent-style-name="Frame">
      <style:graphic-properties draw:stroke="none" svg:stroke-width="0.035cm" draw:stroke-linejoin="miter" svg:stroke-linecap="butt" draw:fill="solid" draw:fill-color="#f1f1f2" draw:textarea-vertical-align="middle" draw:auto-grow-height="false" fo:min-height="1.96cm" fo:min-width="15.129cm" fo:padding-top="0.127cm" fo:padding-bottom="0.127cm" fo:padding-left="0.254cm" fo:padding-right="0.254cm" fo:wrap-option="wrap" loext:decorative="false" fo:margin-left="0cm" fo:margin-right="0.002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parent-style-name="Frame">
      <style:graphic-properties draw:stroke="none" svg:stroke-width="0.035cm" draw:stroke-linejoin="miter" svg:stroke-linecap="butt" draw:fill="solid" draw:fill-color="#e90649" draw:textarea-vertical-align="middle" draw:auto-grow-height="false" fo:min-height="0.663cm" fo:min-width="15.266cm" fo:padding-top="0.127cm" fo:padding-bottom="0.127cm" fo:padding-left="0.254cm" fo:padding-right="0.254cm" fo:wrap-option="wrap" loext:decorative="false" fo:margin-left="0cm" fo:margin-right="0.002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parent-style-name="Frame">
      <style:graphic-properties draw:stroke="none" svg:stroke-width="0.035cm" draw:stroke-linejoin="miter" svg:stroke-linecap="butt" draw:fill="solid" draw:fill-color="#f1f1f2" draw:textarea-vertical-align="middle" draw:auto-grow-height="false" fo:min-height="1.034cm" fo:min-width="15.228cm" fo:padding-top="0.127cm" fo:padding-bottom="0.127cm" fo:padding-left="0.254cm" fo:padding-right="0.254cm" fo:wrap-option="wrap" loext:decorative="false" fo:margin-left="0cm" fo:margin-right="0.002cm" fo:margin-top="0cm" fo:margin-bottom="0.00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parent-style-name="Frame">
      <style:graphic-properties draw:stroke="none" svg:stroke-width="0.035cm" draw:stroke-linejoin="miter" svg:stroke-linecap="butt" draw:fill="solid" draw:fill-color="#e40649" draw:textarea-vertical-align="middle" draw:auto-grow-height="false" fo:min-height="0.753cm" fo:min-width="20.502cm" fo:padding-top="0.127cm" fo:padding-bottom="0.127cm" fo:padding-left="0.254cm" fo:padding-right="0.254cm" fo:wrap-option="wrap" loext:decorative="false"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svg:stroke-width="0.035cm" draw:stroke-linejoin="miter" svg:stroke-linecap="butt" draw:fill="solid" draw:fill-color="#e40649" draw:textarea-vertical-align="middle" draw:auto-grow-height="false" fo:min-height="0.753cm" fo:min-width="20.502cm" fo:padding-top="0.127cm" fo:padding-bottom="0.127cm" fo:padding-left="0.254cm" fo:padding-right="0.254cm" fo:wrap-option="wrap" loext:decorative="false"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g text:anchor-type="char" draw:z-index="5" draw:name="Group 3" draw:style-name="gr1"><draw:g draw:style-name="gr2"><draw:frame draw:name="Image 4" draw:style-name="gr3" draw:text-style-name="P1" svg:width="5.379cm" svg:height="2.49cm" svg:x="-1.595cm" svg:y="-1.265cm"><draw:image xlink:href="Pictures/100000010000019E000000CC089EBF26.png" xlink:type="simple" xlink:show="embed" xlink:actuate="onLoad" draw:mime-type="image/png"><text:p/></draw:image></draw:frame><draw:custom-shape draw:name="Zone de texte 1" draw:style-name="gr4" draw:text-style-name="P3" svg:width="15.153cm" svg:height="2.266cm" svg:x="4.118cm" svg:y="-0.951cm"><text:p text:style-name="P2" loext:marker-style-name="T1"><loext:content-control loext:plain-text="true" loext:alias="Titre" loext:tag="Titre" loext:id="-730457355"><text:span text:style-name="Titre_20_DDC"><text:span text:style-name="T2">Ingénieur informatique<text:tab/><text:tab/><text:tab/><text:tab/></text:span></text:span></loext:content-control></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draw:frame draw:name="Graphique 17" draw:style-name="gr3" draw:text-style-name="P1" svg:width="8.268cm" svg:height="8.27cm" svg:x="13.01cm" svg:y="-4.17cm"><draw:image xlink:href="Pictures/100012450000635200006352B2FCB8BD.svg" xlink:type="simple" xlink:show="embed" xlink:actuate="onLoad" draw:mime-type="image/svg+xml"><text:p/></draw:image><draw:image xlink:href="Pictures/10000001000002C3000002C32D9E0E01.png" xlink:type="simple" xlink:show="embed" xlink:actuate="onLoad" draw:mime-type="image/png"/><svg:desc>Une grille avec petits cercles</svg:desc></draw:frame><draw:custom-shape draw:name="Rectangle : coins arrondis 11" draw:style-name="gr5" draw:text-style-name="P5" svg:width="2.733cm" svg:height="1.075cm" svg:x="15.862cm" svg:y="-1.595cm"><text:p text:style-name="P4" loext:marker-style-name="T3"><loext:content-control loext:showing-place-holder="true" loext:plain-text="true" loext:alias="Trigramme" loext:tag="Trigramme" loext:id="1115255764"><text:span text:style-name="Trigramme"><text:span text:style-name="T4">Trigramme</text:span></text:span></loext:content-control></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draw:g><draw:custom-shape draw:name="Rectangle : coins arrondis 8" draw:style-name="gr6" draw:text-style-name="P7" svg:width="6.659cm" svg:height="1.911cm" svg:x="10.167cm" svg:y="0.947cm"><text:p text:style-name="P6" loext:marker-style-name="T5"><text:span text:style-name="T6">Disponible le</text:span><text:span text:style-name="T5"> </text:span><loext:content-control loext:date="true" loext:date-format="dd/MM/yyyy" loext:date-rfc-language-tag="fr-FR" loext:current-date="2026-01-06T00:00:00Z" loext:alias="Date de dispo" loext:tag="Disponibilité" loext:id="744066994"><text:span text:style-name="T7">06/01/2026</text:span></loext:content-control></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draw:g></text:p>
      <text:p text:style-name="P8" loext:marker-style-name="T8"/>
      <text:p text:style-name="Standard"/>
      <text:p text:style-name="P9" loext:marker-style-name="T9"><draw:frame draw:style-name="fr1" draw:name="Frame11" text:anchor-type="paragraph" svg:y="5.048cm" svg:width="17.789cm" draw:z-index="32" loext:may-break-between-pages="true"><draw:text-box fo:min-height="0.041cm"><table:table table:name="Table1" table:style-name="Table1"><table:table-column table:style-name="Table1.A"/><table:table-column table:style-name="Table1.B"/><table:table-column table:style-name="Table1.C"/><table:table-row table:style-name="Table1.1"><table:table-cell table:style-name="Table1.A1" office:value-type="string"><text:p text:style-name="P10"><draw:g text:anchor-type="as-char" draw:z-index="18" draw:name="Group 1" draw:style-name="gr7"><draw:custom-shape draw:name="Ellipse 2" draw:style-name="gr8" draw:text-style-name="P11" svg:width="1.398cm" svg:height="1.359cm" svg:x="0cm" svg:y="0cm"><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Freeform 1" draw:style-name="gr9" draw:text-style-name="P12" svg:width="0.971cm" svg:height="0.666cm" svg:x="0.226cm" svg:y="0.33cm"><text:p/><draw:enhanced-geometry draw:mirror-horizontal="false" draw:mirror-vertical="false" svg:viewBox="0 0 0 0" draw:glue-points="45 0 40 0 0 22 4 28 4 31 4 40 2 44 2 54 10 55 13 51 9 41 5 35 9 29 15 32 15 47 71 47 71 32 85 22 4 52 9 45 4 52 58 44 55 47 57 49 65 45 43 53 20 45 49 50 49 46 20 40 40 43 45 43 65 41 5 22 80 22" drawooo:sub-view-size="85 58" draw:text-areas="0 0 ?f0 ?f1" draw:type="ooxml-non-primitive" draw:enhanced-path="M 82 17 C 45 0 45 0 45 0 44 0 43 0 43 0 42 0 41 0 40 0 3 17 3 17 3 17 1 18 0 20 0 22 0 24 1 25 2 26 3 27 3 27 4 28 5 28 5 29 5 29 5 30 5 30 4 31 3 32 1 33 1 35 1 38 3 39 4 40 5 40 5 41 5 41 3 41 2 42 2 44 1 51 1 51 1 51 1 52 1 54 2 54 2 55 3 55 4 55 10 55 10 55 10 55 11 55 12 55 12 54 13 54 13 52 13 51 12 44 12 44 12 44 12 42 10 41 9 41 9 39 7 38 6 37 5 36 5 36 5 35 5 35 5 34 6 34 7 33 9 32 9 29 9 29 9 29 9 29 15 32 15 32 15 32 15 32 15 32 15 33 15 47 15 47 15 47 15 57 35 58 43 58 51 58 71 57 71 47 71 32 71 32 71 32 71 32 71 32 71 32 82 27 82 27 82 27 84 26 85 24 85 22 85 20 84 18 82 17 Z M 4 52 C 5 45 5 45 5 45 9 45 9 45 9 45 10 52 10 52 10 52 L 4 52 Z M 65 41 C 64 42 62 43 58 44 58 45 57 45 56 45 55 45 54 46 55 47 55 48 56 49 56 49 56 49 57 49 57 49 58 48 58 48 59 48 62 47 64 46 65 45 65 47 65 47 65 47 65 50 55 53 43 53 30 53 20 50 20 47 20 45 20 45 20 45 25 48 34 50 43 50 45 50 47 50 49 50 50 50 51 49 51 48 51 47 50 46 49 46 47 46 45 46 43 46 30 46 22 43 20 40 20 34 20 34 20 34 40 43 40 43 40 43 41 44 42 44 42 44 43 44 44 44 45 43 65 34 65 34 65 34 L 65 41 Z M 42 38 C 5 22 5 22 5 22 43 5 43 5 43 5 80 22 80 22 80 22 L 42 38 Z N"><draw:equation draw:name="f0" draw:formula="logwidth"/><draw:equation draw:name="f1" draw:formula="logheight"/></draw:enhanced-geometry></draw:custom-shape></draw:g></text:p></table:table-cell><table:table-cell table:style-name="Table1.B1" table:number-columns-spanned="2" office:value-type="string"><text:p text:style-name="P10" loext:marker-style-name="T10"><text:span text:style-name="T11">FORMATION</text:span></text:p></table:table-cell><table:covered-table-cell/></table:table-row><table:table-row table:style-name="Table1.2"><table:table-cell table:style-name="Table1.A1" office:value-type="string"><text:p text:style-name="P10"/></table:table-cell><table:table-cell table:style-name="Table1.B2" table:number-columns-spanned="2" office:value-type="string"><text:p text:style-name="P13"/><text:list text:style-name="WWNum1"><text:list-item><text:p text:style-name="P14"><text:span text:style-name="Texte">2025</text:span><loext:content-control loext:alias="Formation" loext:tag="Formation" loext:id="1724032791"><text:span text:style-name="Texte"> – </text:span><text:span text:style-name="Texte"><text:span text:style-name="T12">Master Cryptologie et Sécurité Informatique </text:span></text:span><text:span text:style-name="Texte">– Université de Bordeaux</text:span></loext:content-control></text:p></text:list-item><text:list-item><text:p text:style-name="P14"><text:span text:style-name="Texte">2021 - 2022</text:span><loext:content-control loext:alias="Formation" loext:tag="Formation" loext:id="1644156339"><text:span text:style-name="Texte"> – </text:span><text:span text:style-name="Texte"><text:span text:style-name="T12">Master 1 Recherche Opérationnelle et Aide à la Décision <text:line-break/></text:span></text:span><text:span text:style-name="Texte"><text:span text:style-name="T13">(optimisation mathématique) </text:span></text:span><text:span text:style-name="Texte">– Université de Bordeaux</text:span></loext:content-control></text:p></text:list-item><text:list-item><text:p text:style-name="P14"><text:span text:style-name="Texte">2021</text:span><loext:content-control loext:alias="Formation" loext:tag="Formation" loext:id="2130818298"><text:span text:style-name="Texte"> – </text:span><text:span text:style-name="Texte"><text:span text:style-name="T12">Licence Mathématique et Informatique </text:span></text:span><text:span text:style-name="Texte">– Université de Poitiers</text:span></loext:content-control></text:p></text:list-item><text:list-item><text:p text:style-name="P14"><loext:content-control loext:alias="Formation" loext:tag="Formation" loext:id="-1289969362"><text:span text:style-name="Texte">2018 – </text:span><text:span text:style-name="Texte"><text:span text:style-name="T12">Bac S spécialité maths </text:span></text:span><text:span text:style-name="Texte">– Lycée Antoine de S</text:span><text:span text:style-name="Texte"><text:span text:style-name="T14">aint</text:span></text:span><text:span text:style-name="Texte"> Exupéry – La Rochelle</text:span></loext:content-control></text:p></text:list-item></text:list></table:table-cell><table:covered-table-cell/></table:table-row><table:table-row table:style-name="Table1.2"><table:table-cell table:style-name="Table1.A1" office:value-type="string"><text:p text:style-name="P10"><draw:g text:anchor-type="as-char" draw:z-index="19" draw:name="Group 2" draw:style-name="gr10"><draw:custom-shape draw:name="Ellipse 3" draw:style-name="gr11" draw:text-style-name="P11" svg:width="1.398cm" svg:height="1.401cm" svg:x="0cm" svg:y="0cm"><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Freeform 2" draw:style-name="gr12" draw:text-style-name="P12" svg:width="0.847cm" svg:height="0.782cm" svg:x="0.275cm" svg:y="0.309cm"><text:p/><draw:enhanced-geometry draw:mirror-horizontal="false" draw:mirror-vertical="false" svg:viewBox="0 0 0 0" draw:glue-points="39 36 41 44 35 50 27 53 18 53 11 50 4 44 6 36 0 28 7 23 4 18 15 16 19 8 28 15 35 12 41 19 45 27 23 22 32 31 63 16 64 24 55 22 46 24 46 16 46 9 46 2 55 4 59 0 62 7 68 15 62 55 59 63 54 59 45 60 41 52 47 44 50 36 56 40 64 39 63 46 55 8 59 13 50 49 55 45" drawooo:sub-view-size="68 63" draw:text-areas="0 0 ?f0 ?f1" draw:type="ooxml-non-primitive" draw:enhanced-path="M 45 35 C 45 35 45 36 45 36 39 36 39 36 39 36 39 37 38 38 38 39 39 41 40 42 41 43 41 43 41 44 41 44 41 44 41 44 41 45 40 46 36 50 35 50 35 50 35 50 35 50 31 47 31 47 31 47 30 47 29 47 28 48 28 49 27 51 27 53 27 54 26 54 26 54 19 54 19 54 19 54 19 54 18 54 18 53 17 48 17 48 17 48 16 47 16 47 15 47 11 50 11 50 11 50 10 50 10 50 10 50 10 50 9 50 9 50 8 49 4 45 4 44 4 44 4 44 4 43 5 42 6 41 7 39 7 38 6 37 6 36 1 35 1 35 1 35 0 35 0 35 0 34 0 28 0 28 0 28 0 27 0 27 1 27 6 26 6 26 6 26 6 25 7 24 7 23 6 22 5 20 4 19 4 19 4 19 4 18 4 18 4 18 4 18 5 17 9 12 10 12 10 12 10 12 11 13 15 16 15 16 15 16 16 15 16 15 17 15 18 13 18 11 18 9 18 9 19 8 19 8 26 8 26 8 26 8 26 8 27 9 27 9 28 15 28 15 28 15 29 15 30 15 31 16 35 13 35 13 35 13 35 12 35 12 35 12 36 12 36 12 36 13 37 13 41 17 41 18 41 19 41 19 41 19 40 20 39 22 38 23 38 24 39 25 39 26 45 27 45 27 45 27 45 27 45 27 45 28 L 45 35 Z M 23 22 C 18 22 13 26 13 31 13 36 18 40 23 40 28 40 32 36 32 31 32 26 28 22 23 22 Z M 68 15 C 68 16 64 16 63 16 63 17 62 18 62 18 62 19 64 23 64 23 64 23 64 23 64 24 63 24 59 26 59 26 59 26 56 22 56 22 55 22 55 22 55 22 54 22 54 22 54 22 53 22 50 26 50 26 50 26 46 24 46 24 45 23 45 23 45 23 45 23 47 19 47 18 47 18 46 17 46 16 45 16 41 16 41 15 41 10 41 10 41 10 41 10 45 9 46 9 46 9 47 8 47 7 47 7 45 3 45 2 45 2 45 2 46 2 46 2 50 0 50 0 50 0 53 3 54 4 54 4 54 4 55 4 55 4 55 4 56 4 57 2 58 1 59 0 59 0 59 0 59 0 59 0 63 2 64 2 64 2 64 2 64 2 64 3 62 7 62 7 62 8 63 9 63 9 64 9 68 10 68 10 L 68 15 Z M 68 52 C 68 52 64 53 63 53 63 54 62 54 62 55 62 56 64 59 64 60 64 60 64 60 64 60 63 60 59 63 59 63 59 63 56 59 56 59 55 59 55 59 55 59 54 59 54 59 54 59 53 59 50 63 50 63 50 63 46 60 46 60 45 60 45 60 45 60 45 59 47 56 47 55 47 54 46 54 46 53 45 53 41 52 41 52 41 47 41 47 41 47 41 46 45 46 46 46 46 45 47 45 47 44 47 43 45 40 45 39 45 39 45 39 46 39 46 39 50 36 50 36 50 36 53 40 54 40 54 40 54 40 55 40 55 40 55 40 56 40 57 39 58 38 59 36 59 36 59 36 59 36 59 36 63 39 64 39 64 39 64 39 64 39 64 40 62 43 62 44 62 45 63 45 63 46 64 46 68 46 68 47 L 68 52 Z M 55 8 C 52 8 50 10 50 13 50 15 52 17 55 17 57 17 59 15 59 13 59 10 57 8 55 8 Z M 55 45 C 52 45 50 47 50 49 50 52 52 54 55 54 57 54 59 52 59 49 59 47 57 45 55 45 Z N"><draw:equation draw:name="f0" draw:formula="logwidth"/><draw:equation draw:name="f1" draw:formula="logheight"/></draw:enhanced-geometry></draw:custom-shape></draw:g></text:p></table:table-cell><table:table-cell table:style-name="Table1.B3" table:number-columns-spanned="2" office:value-type="string"><text:p text:style-name="P10"/><text:p text:style-name="P10" loext:marker-style-name="T11"><text:span text:style-name="T11">COMPÉTENCES TECHNIQUES</text:span></text:p><text:p text:style-name="P10"/></table:table-cell><table:covered-table-cell/></table:table-row><table:table-row table:style-name="Table1.2"><table:table-cell table:style-name="Table1.A1" office:value-type="string"><text:p text:style-name="P10"/></table:table-cell><table:table-cell table:style-name="Table1.B2" table:number-columns-spanned="2" office:value-type="string"><text:p text:style-name="P10"/><text:list xml:id="list3519488599" text:style-name="WWNum5"><text:list-item><text:p text:style-name="P15" loext:marker-style-name="T15"><loext:content-control loext:alias="Titre Catégorie" loext:tag="Titre Catégorie" loext:id="-1481223299"><text:span text:style-name="Titre_20_Catégorie">Développement :</text:span></loext:content-control> <loext:content-control loext:alias="Compétences" loext:tag="Compétences" loext:id="406816580"><text:span text:style-name="Texte">git, make, C, C++, valgrind, Java, Python, php, J</text:span><text:span text:style-name="Texte"><text:span text:style-name="T14">ava</text:span></text:span><text:span text:style-name="Texte">S</text:span><text:span text:style-name="Texte"><text:span text:style-name="T14">cript</text:span></text:span><text:span text:style-name="Texte">, SQL, ASM (x86_64, arm), R, documentation (Doxygen), tests (Cunit, Junit, unittest)</text:span></loext:content-control></text:p></text:list-item><text:list-item><text:p text:style-name="P16" loext:marker-style-name="T15"><loext:content-control loext:alias="Titre Catégorie" loext:tag="Titre Catégorie" loext:id="1625735047"><text:span text:style-name="Titre_20_Catégorie">Automatisation </text:span></loext:content-control>: <loext:content-control loext:alias="Compétences" loext:tag="Compétences" loext:id="-126858992"><text:span text:style-name="Texte">shell (bash, powershell), docker, github actions, gitlab CI/CD</text:span></loext:content-control></text:p></text:list-item><text:list-item><text:p text:style-name="P16" loext:marker-style-name="T16"><loext:content-control loext:alias="Titre Catégorie" loext:tag="Titre Catégorie" loext:id="1826078946"><text:span text:style-name="Titre_20_Catégorie">Cyber</text:span><text:span text:style-name="Titre_20_Catégorie"><text:span text:style-name="T16">sécurité </text:span></text:span></loext:content-control><text:span text:style-name="T16">: </text:span><loext:content-control loext:alias="Compétences" loext:tag="Compétences" loext:id="205685151"><text:span text:style-name="Texte"><text:span text:style-name="T16">Fuzzing, code review, gestion des dépendances, veille sécurité </text:span></text:span></loext:content-control></text:p></text:list-item><text:list-item><text:p text:style-name="P16" loext:marker-style-name="T17"><loext:content-control loext:alias="Titre Catégorie" loext:tag="Titre Catégorie" loext:id="1377583978"><text:span text:style-name="Titre_20_Catégorie">Systèmes d‘exploitation</text:span></loext:content-control><text:span text:style-name="Default_20_Paragraph_20_Font"><text:span text:style-name="T18"> </text:span></text:span>: <loext:content-control loext:alias="Compétences" loext:tag="Compétences" loext:id="-1962646370"><text:s/><text:span text:style-name="Texte">GNU/Linux (Debian, Ubuntu, Parrot OS, Kali), Microsoft Windows, </text:span><text:span text:style-name="Texte"><text:span text:style-name="T19">Unicorn engine,</text:span></text:span><text:span text:style-name="Texte"> QEMU, VirtualBox, VMware</text:span></loext:content-control></text:p></text:list-item></text:list></table:table-cell><table:covered-table-cell/></table:table-row><table:table-row table:style-name="Table1.2"><table:table-cell table:style-name="Table1.A1" office:value-type="string"><text:p text:style-name="P10"><draw:g text:anchor-type="as-char" draw:z-index="20" draw:name="Group 4" draw:style-name="gr7"><draw:custom-shape draw:name="Ellipse 4" draw:style-name="gr8" draw:text-style-name="P11" svg:width="1.398cm" svg:height="1.359cm" svg:x="0cm" svg:y="0cm"><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frame draw:name="Graphique 1" draw:style-name="gr3" draw:text-style-name="P1" svg:width="0.994cm" svg:height="0.994cm" svg:x="0.203cm" svg:y="0.168cm"><draw:image xlink:href="Pictures/1000029000000A0600000A06DF6C5596.svg" xlink:type="simple" xlink:show="embed" xlink:actuate="onLoad" draw:mime-type="image/svg+xml"><text:p/></draw:image><draw:image xlink:href="Pictures/100000010000007900000079172A1B23.png" xlink:type="simple" xlink:show="embed" xlink:actuate="onLoad" draw:mime-type="image/png"/><svg:desc>Porte-documents avec un remplissage uni</svg:desc></draw:frame></draw:g></text:p></table:table-cell><table:table-cell table:style-name="Table1.B3" table:number-columns-spanned="2" office:value-type="string"><text:p text:style-name="P10"/><text:p text:style-name="P17" loext:marker-style-name="T11"><text:span text:style-name="T11">EX</text:span><text:span text:style-name="T20">PÉ</text:span><text:span text:style-name="T11">RIENCES PROFESSIONNELLES</text:span></text:p><text:p text:style-name="P13"/></table:table-cell><table:covered-table-cell/></table:table-row><table:table-row table:style-name="Table1.2"><table:table-cell table:style-name="Table1.A1" office:value-type="string"><text:p text:style-name="P10"/></table:table-cell><table:table-cell table:style-name="Table1.B6" table:number-columns-spanned="2" office:value-type="string"><text:p text:style-name="P18" loext:marker-style-name="T21"><text:span text:style-name="Titre_20_Catégorie"><text:span text:style-name="T21"/></text:span></text:p><text:list text:style-name="WWNum7"><text:list-item><text:p text:style-name="P19" loext:marker-style-name="T13"><text:span text:style-name="Titre_20_Catégorie"><text:span text:style-name="T13">2025 | 6 MOIS : <text:s/>Spécialiste sécurité logicielle – STMicroelectronics</text:span></text:span></text:p></text:list-item><text:list-item><text:p text:style-name="P19" loext:marker-style-name="T22"><text:span text:style-name="Titre_20_Catégorie"><text:span text:style-name="T23">2024-2025 | 7 MOIS : <text:s/>Consultant cybersécurité – solving company</text:span></text:span></text:p></text:list-item></text:list></table:table-cell><table:covered-table-cell/></table:table-row><table:table-row table:style-name="Table1.2"><table:table-cell table:style-name="Table1.A1" office:value-type="string"><text:p text:style-name="P10"><draw:g text:anchor-type="as-char" draw:z-index="21" draw:name="Group 6" draw:style-name="gr7"><draw:custom-shape draw:name="Ellipse 5" draw:style-name="gr8" draw:text-style-name="P11" svg:width="1.398cm" svg:height="1.359cm" svg:x="0cm" svg:y="0cm"><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Freeform 3" draw:style-name="gr13" draw:text-style-name="P12" svg:width="0.865cm" svg:height="0.865cm" svg:x="0.266cm" svg:y="0.247cm"><text:p/><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drawooo:sub-view-size="3722 3706" draw:text-areas="0 0 ?f112 ?f113" draw:type="ooxml-non-primitive" draw:enhanced-path="M 2834 2581 L 2808 2684 2778 2784 2745 2881 2709 2971 2670 3058 2627 3141 2581 3219 2533 3292 2481 3361 2571 3321 2658 3275 2742 3225 2823 3169 2900 3110 2974 3046 3043 2978 3107 2906 3168 2829 3225 2750 3275 2667 3321 2581 2834 2581 Z M 1976 2581 L 1976 3463 2025 3446 2073 3424 2122 3395 2168 3362 2213 3322 2257 3277 2300 3226 2342 3168 2388 3098 2432 3024 2471 2944 2509 2860 2542 2772 2573 2679 2601 2581 1976 2581 Z M 1121 2581 L 1148 2679 1178 2772 1211 2860 1248 2945 1288 3024 1331 3098 1377 3168 1426 3233 1476 3290 1528 3339 1581 3380 1635 3415 1690 3442 1745 3463 1745 2581 1121 2581 Z M 401 2581 L 447 2667 497 2750 554 2829 614 2906 679 2978 748 3046 822 3110 899 3169 980 3225 1064 3275 1151 3321 1241 3361 1189 3292 1140 3219 1095 3141 1052 3058 1013 2971 976 2881 943 2784 913 2684 886 2581 401 2581 Z M 2879 1341 L 2897 1469 2908 1597 2916 1725 2919 1851 2916 1976 2908 2102 2897 2229 2879 2358 3417 2358 3446 2259 3468 2158 3484 2057 3493 1954 3496 1851 3493 1746 3483 1642 3465 1540 3442 1439 3412 1341 2879 1341 Z M 1976 1341 L 1976 2358 2651 2358 2666 2251 2677 2147 2686 2046 2691 1947 2692 1851 2689 1724 2681 1596 2668 1468 2647 1341 1976 1341 Z M 1074 1341 L 1055 1468 1041 1596 1032 1724 1029 1851 1030 1947 1036 2046 1044 2147 1056 2251 1071 2358 1745 2358 1745 1341 1074 1341 Z M 309 1341 L 279 1439 256 1540 239 1642 229 1746 226 1851 229 1954 238 2057 254 2158 276 2259 305 2358 842 2358 825 2229 813 2102 806 1976 804 1851 806 1725 813 1597 825 1469 842 1341 309 1341 Z M 2481 345 L 2539 423 2593 507 2643 596 2689 690 2732 789 2770 893 2805 1003 2834 1117 3321 1117 3274 1032 3221 950 3165 872 3104 796 3038 725 2969 657 2895 593 2818 534 2739 479 2655 430 2570 384 2481 345 Z M 1241 345 L 1152 384 1066 430 983 479 903 534 827 593 753 657 684 725 618 796 557 872 500 950 448 1032 401 1117 886 1117 918 1003 951 893 990 789 1032 690 1078 596 1128 507 1182 423 1241 345 Z M 1976 243 L 1976 1117 2601 1117 2572 1021 2541 929 2506 841 2470 757 2429 679 2387 604 2341 536 2291 471 2242 415 2191 366 2139 325 2086 290 2032 263 1976 243 Z M 1745 243 L 1690 263 1636 290 1582 325 1530 366 1479 415 1430 471 1382 536 1335 604 1292 679 1251 757 1215 841 1181 928 1149 1021 1121 1117 1745 1117 1745 243 Z M 1859 0 L 1968 4 2073 13 2177 28 2281 49 2382 76 2483 109 2582 148 2679 193 2772 241 2861 292 2946 350 3028 409 3104 474 3178 542 3247 615 3311 692 3372 772 3429 855 3482 944 3530 1036 3574 1132 3613 1230 3646 1330 3674 1432 3694 1534 3709 1639 3719 1744 3722 1851 3719 1959 3709 2064 3694 2168 3674 2272 3646 2374 3613 2473 3574 2573 3530 2668 3482 2760 3429 2848 3372 2933 3311 3014 3247 3090 3178 3163 3104 3231 3028 3296 2946 3356 2861 3414 2772 3465 2679 3513 2582 3558 2483 3597 2382 3630 2281 3657 2177 3679 2073 3693 1968 3703 1859 3706 1752 3703 1646 3693 1542 3679 1439 3658 1337 3630 1236 3597 1137 3558 1041 3515 949 3465 860 3414 775 3358 694 3297 617 3231 543 3164 474 3090 410 3014 349 2933 291 2850 238 2761 190 2668 146 2573 107 2473 74 2374 47 2272 26 2168 12 2064 2 1959 0 1851 2 1744 12 1639 26 1534 47 1431 74 1330 107 1230 146 1132 190 1036 238 944 291 855 349 772 410 690 474 615 543 542 617 474 694 409 775 349 860 292 949 241 1041 193 1137 148 1236 109 1337 76 1439 49 1542 28 1646 13 1752 4 1859 0 Z N"><draw:equation draw:name="f0" draw:formula="2670*logwidth/3722"/><draw:equation draw:name="f1" draw:formula="3058*logheight/3706"/><draw:equation draw:name="f2" draw:formula="2658*logwidth/3722"/><draw:equation draw:name="f3" draw:formula="3275*logheight/3706"/><draw:equation draw:name="f4" draw:formula="3107*logwidth/3722"/><draw:equation draw:name="f5" draw:formula="2906*logheight/3706"/><draw:equation draw:name="f6" draw:formula="1976*logwidth/3722"/><draw:equation draw:name="f7" draw:formula="2581*logheight/3706"/><draw:equation draw:name="f8" draw:formula="2213*logwidth/3722"/><draw:equation draw:name="f9" draw:formula="3322*logheight/3706"/><draw:equation draw:name="f10" draw:formula="2471*logwidth/3722"/><draw:equation draw:name="f11" draw:formula="2944*logheight/3706"/><draw:equation draw:name="f12" draw:formula="1121*logwidth/3722"/><draw:equation draw:name="f13" draw:formula="2581*logheight/3706"/><draw:equation draw:name="f14" draw:formula="1331*logwidth/3722"/><draw:equation draw:name="f15" draw:formula="3098*logheight/3706"/><draw:equation draw:name="f16" draw:formula="1635*logwidth/3722"/><draw:equation draw:name="f17" draw:formula="3415*logheight/3706"/><draw:equation draw:name="f18" draw:formula="447*logwidth/3722"/><draw:equation draw:name="f19" draw:formula="2667*logheight/3706"/><draw:equation draw:name="f20" draw:formula="822*logwidth/3722"/><draw:equation draw:name="f21" draw:formula="3110*logheight/3706"/><draw:equation draw:name="f22" draw:formula="1189*logwidth/3722"/><draw:equation draw:name="f23" draw:formula="3292*logheight/3706"/><draw:equation draw:name="f24" draw:formula="943*logwidth/3722"/><draw:equation draw:name="f25" draw:formula="2784*logheight/3706"/><draw:equation draw:name="f26" draw:formula="2908*logwidth/3722"/><draw:equation draw:name="f27" draw:formula="1597*logheight/3706"/><draw:equation draw:name="f28" draw:formula="2879*logwidth/3722"/><draw:equation draw:name="f29" draw:formula="2358*logheight/3706"/><draw:equation draw:name="f30" draw:formula="3496*logwidth/3722"/><draw:equation draw:name="f31" draw:formula="1851*logheight/3706"/><draw:equation draw:name="f32" draw:formula="2879*logwidth/3722"/><draw:equation draw:name="f33" draw:formula="1341*logheight/3706"/><draw:equation draw:name="f34" draw:formula="2686*logwidth/3722"/><draw:equation draw:name="f35" draw:formula="2046*logheight/3706"/><draw:equation draw:name="f36" draw:formula="2647*logwidth/3722"/><draw:equation draw:name="f37" draw:formula="1341*logheight/3706"/><draw:equation draw:name="f38" draw:formula="1029*logwidth/3722"/><draw:equation draw:name="f39" draw:formula="1851*logheight/3706"/><draw:equation draw:name="f40" draw:formula="1745*logwidth/3722"/><draw:equation draw:name="f41" draw:formula="2358*logheight/3706"/><draw:equation draw:name="f42" draw:formula="239*logwidth/3722"/><draw:equation draw:name="f43" draw:formula="1642*logheight/3706"/><draw:equation draw:name="f44" draw:formula="276*logwidth/3722"/><draw:equation draw:name="f45" draw:formula="2259*logheight/3706"/><draw:equation draw:name="f46" draw:formula="804*logwidth/3722"/><draw:equation draw:name="f47" draw:formula="1851*logheight/3706"/><draw:equation draw:name="f48" draw:formula="2481*logwidth/3722"/><draw:equation draw:name="f49" draw:formula="345*logheight/3706"/><draw:equation draw:name="f50" draw:formula="2770*logwidth/3722"/><draw:equation draw:name="f51" draw:formula="893*logheight/3706"/><draw:equation draw:name="f52" draw:formula="3165*logwidth/3722"/><draw:equation draw:name="f53" draw:formula="872*logheight/3706"/><draw:equation draw:name="f54" draw:formula="2739*logwidth/3722"/><draw:equation draw:name="f55" draw:formula="479*logheight/3706"/><draw:equation draw:name="f56" draw:formula="1066*logwidth/3722"/><draw:equation draw:name="f57" draw:formula="430*logheight/3706"/><draw:equation draw:name="f58" draw:formula="618*logwidth/3722"/><draw:equation draw:name="f59" draw:formula="796*logheight/3706"/><draw:equation draw:name="f60" draw:formula="918*logwidth/3722"/><draw:equation draw:name="f61" draw:formula="1003*logheight/3706"/><draw:equation draw:name="f62" draw:formula="1182*logwidth/3722"/><draw:equation draw:name="f63" draw:formula="423*logheight/3706"/><draw:equation draw:name="f64" draw:formula="2541*logwidth/3722"/><draw:equation draw:name="f65" draw:formula="929*logheight/3706"/><draw:equation draw:name="f66" draw:formula="2291*logwidth/3722"/><draw:equation draw:name="f67" draw:formula="471*logheight/3706"/><draw:equation draw:name="f68" draw:formula="1976*logwidth/3722"/><draw:equation draw:name="f69" draw:formula="243*logheight/3706"/><draw:equation draw:name="f70" draw:formula="1479*logwidth/3722"/><draw:equation draw:name="f71" draw:formula="415*logheight/3706"/><draw:equation draw:name="f72" draw:formula="1215*logwidth/3722"/><draw:equation draw:name="f73" draw:formula="841*logheight/3706"/><draw:equation draw:name="f74" draw:formula="1859*logwidth/3722"/><draw:equation draw:name="f75" draw:formula="0*logheight/3706"/><draw:equation draw:name="f76" draw:formula="2483*logwidth/3722"/><draw:equation draw:name="f77" draw:formula="109*logheight/3706"/><draw:equation draw:name="f78" draw:formula="3028*logwidth/3722"/><draw:equation draw:name="f79" draw:formula="409*logheight/3706"/><draw:equation draw:name="f80" draw:formula="3429*logwidth/3722"/><draw:equation draw:name="f81" draw:formula="855*logheight/3706"/><draw:equation draw:name="f82" draw:formula="3674*logwidth/3722"/><draw:equation draw:name="f83" draw:formula="1432*logheight/3706"/><draw:equation draw:name="f84" draw:formula="3709*logwidth/3722"/><draw:equation draw:name="f85" draw:formula="2064*logheight/3706"/><draw:equation draw:name="f86" draw:formula="3530*logwidth/3722"/><draw:equation draw:name="f87" draw:formula="2668*logheight/3706"/><draw:equation draw:name="f88" draw:formula="3178*logwidth/3722"/><draw:equation draw:name="f89" draw:formula="3163*logheight/3706"/><draw:equation draw:name="f90" draw:formula="2679*logwidth/3722"/><draw:equation draw:name="f91" draw:formula="3513*logheight/3706"/><draw:equation draw:name="f92" draw:formula="2073*logwidth/3722"/><draw:equation draw:name="f93" draw:formula="3693*logheight/3706"/><draw:equation draw:name="f94" draw:formula="1439*logwidth/3722"/><draw:equation draw:name="f95" draw:formula="3658*logheight/3706"/><draw:equation draw:name="f96" draw:formula="860*logwidth/3722"/><draw:equation draw:name="f97" draw:formula="3414*logheight/3706"/><draw:equation draw:name="f98" draw:formula="410*logwidth/3722"/><draw:equation draw:name="f99" draw:formula="3014*logheight/3706"/><draw:equation draw:name="f100" draw:formula="107*logwidth/3722"/><draw:equation draw:name="f101" draw:formula="2473*logheight/3706"/><draw:equation draw:name="f102" draw:formula="0*logwidth/3722"/><draw:equation draw:name="f103" draw:formula="1851*logheight/3706"/><draw:equation draw:name="f104" draw:formula="107*logwidth/3722"/><draw:equation draw:name="f105" draw:formula="1230*logheight/3706"/><draw:equation draw:name="f106" draw:formula="410*logwidth/3722"/><draw:equation draw:name="f107" draw:formula="690*logheight/3706"/><draw:equation draw:name="f108" draw:formula="860*logwidth/3722"/><draw:equation draw:name="f109" draw:formula="292*logheight/3706"/><draw:equation draw:name="f110" draw:formula="1439*logwidth/3722"/><draw:equation draw:name="f111" draw:formula="49*logheight/3706"/><draw:equation draw:name="f112" draw:formula="logwidth"/><draw:equation draw:name="f113" draw:formula="logheight"/></draw:enhanced-geometry></draw:custom-shape></draw:g></text:p></table:table-cell><table:table-cell table:style-name="Table1.B7" table:number-columns-spanned="2" office:value-type="string"><text:p text:style-name="P10" loext:marker-style-name="T11"><text:span text:style-name="T11">NIVEAUX DE LANGUE</text:span></text:p><text:p text:style-name="P10"/></table:table-cell><table:covered-table-cell/></table:table-row><table:table-row table:style-name="Table1.2"><table:table-cell table:style-name="Table1.A1" office:value-type="string"><text:p text:style-name="P10"/></table:table-cell><table:table-cell table:style-name="Table1.B8" table:number-columns-spanned="2" office:value-type="string"><text:p text:style-name="P20"/><text:list text:continue-list="list3519488599" text:style-name="WWNum5"><text:list-item><text:p text:style-name="P16"><loext:content-control loext:alias="Langue" loext:tag="Langue" loext:id="-218446491"><text:span text:style-name="Titre_20_Catégorie">Anglais</text:span></loext:content-control><text:span text:style-name="Titre_20_Catégorie"> : </text:span><loext:content-control loext:alias="Niveau langue" loext:tag="Niveau langue" loext:id="651188575"><text:span text:style-name="Titre_20_Catégorie">niveau professionnel</text:span></loext:content-control></text:p></text:list-item><text:list-item><text:p text:style-name="P21" loext:marker-style-name="T24"><loext:content-control loext:alias="Langue" loext:tag="Langue" loext:id="1132588897"><text:span text:style-name="Titre_20_Catégorie">Allemand</text:span></loext:content-control><text:span text:style-name="Titre_20_Catégorie"> : </text:span><loext:content-control loext:alias="Niveau langue" loext:tag="Niveau langue" loext:id="-1074204336"><text:span text:style-name="Titre_20_Catégorie">niveau Débutant</text:span></loext:content-control></text:p></text:list-item></text:list></table:table-cell><table:covered-table-cell/></table:table-row><table:table-row table:style-name="Table1.2"><table:table-cell table:style-name="Table1.A1" office:value-type="string"><text:p text:style-name="P10"><draw:frame draw:style-name="fr2" draw:name="Graphique 4" text:anchor-type="char" svg:x="0.099cm" svg:y="0.049cm" svg:width="1.235cm" svg:height="1.235cm" draw:z-index="41"><draw:image xlink:href="Pictures/1000198F00000A0600000A0656D890BB.svg" xlink:type="simple" xlink:show="embed" xlink:actuate="onLoad" draw:mime-type="image/svg+xml"/><draw:image xlink:href="Pictures/10000001000000790000007991C52F4D.png" xlink:type="simple" xlink:show="embed" xlink:actuate="onLoad" draw:mime-type="image/png"/><svg:desc>Empreinte digitale avec un remplissage uni</svg:desc></draw:frame><draw:custom-shape text:anchor-type="as-char" draw:z-index="23" draw:name="Ellipse 6" draw:style-name="gr14" draw:text-style-name="P22" svg:width="1.398cm" svg:height="1.359cm"><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table:table-cell><table:table-cell table:style-name="Table1.B9" table:number-columns-spanned="2" office:value-type="string"><text:p text:style-name="P10" loext:marker-style-name="T25"><text:span text:style-name="T11">QUALITÉS</text:span></text:p></table:table-cell><table:covered-table-cell/></table:table-row><table:table-row table:style-name="Table1.2"><table:table-cell table:style-name="Table1.A1" office:value-type="string"><text:p text:style-name="P10"/></table:table-cell><table:table-cell table:style-name="Table1.B8" office:value-type="string"><text:p text:style-name="P23"><text:span text:style-name="Titre_20_Catégorie"/></text:p><text:list text:style-name="WWNum12"><text:list-item><text:p text:style-name="P24"><text:span text:style-name="Titre_20_Catégorie">Curiosité</text:span></text:p></text:list-item><text:list-item><text:p text:style-name="P24"><text:span text:style-name="Titre_20_Catégorie">Bonne Communication</text:span></text:p></text:list-item></text:list></table:table-cell><table:table-cell table:style-name="Table1.C10" office:value-type="string"><text:p text:style-name="P23"><text:span text:style-name="Titre_20_Catégorie"/></text:p><text:list text:continue-numbering="true" text:style-name="WWNum12"><text:list-item><text:p text:style-name="P24"><text:span text:style-name="Titre_20_Catégorie">Enthousiasme</text:span></text:p></text:list-item><text:list-item><text:p text:style-name="P24"><text:span text:style-name="Titre_20_Catégorie">organisation</text:span></text:p></text:list-item></text:list></table:table-cell></table:table-row></table:table></draw:text-box></draw:frame><text:soft-page-break/><text:span text:style-name="Titre_20_Catégorie"><text:span text:style-name="T9"/></text:span></text:p>
      <text:p text:style-name="P25" loext:marker-style-name="T26"><text:span text:style-name="Titre_20_Catégorie"><text:span text:style-name="T26"/></text:span></text:p>
      <text:h text:style-name="P26" text:outline-level="2" loext:marker-style-name="T12"><loext:content-control loext:alias="Intitulé du poste" loext:id="-1157913963"><text:span text:style-name="Style3"><text:span text:style-name="T12">Spécialiste sécurité logicielle</text:span></text:span></loext:content-control><text:span text:style-name="T27"> <text:s/></text:span><text:tab/><loext:content-control loext:alias="Nom de l'entreprise" loext:tag="Nom de l'entreprise" loext:id="-1933884739"><text:span text:style-name="Style3"><text:span text:style-name="T12">STMicroelectronics</text:span></text:span></loext:content-control></text:h>
      <table:table table:name="Table2" table:style-name="Table2">
        <table:table-column table:style-name="Table2.A"/>
        <table:table-column table:style-name="Table2.B"/>
        <table:table-row table:style-name="Table2.1">
          <table:table-cell table:style-name="Table2.A1" office:value-type="string">
            <text:p text:style-name="P27"><loext:content-control loext:date="true" loext:date-format="MMMM yyyy" loext:date-rfc-language-tag="fr-FR" loext:current-date="2025-03-03T00:00:00Z" loext:alias="Date début" loext:tag="Date début" loext:id="-8368171"><text:span text:style-name="Style1"><text:span text:style-name="T28">mars 2025</text:span></text:span></loext:content-control><text:span text:style-name="Dates"> </text:span><text:span text:style-name="T29">– </text:span><loext:content-control loext:date="true" loext:date-format="MMMM yyyy" loext:date-rfc-language-tag="fr-FR" loext:current-date="2025-08-29T00:00:00Z" loext:alias="Date fin" loext:tag="Date fin" loext:id="-1310327277"><text:span text:style-name="T30">août 2025</text:span></loext:content-control><text:span text:style-name="T29"> </text:span></text:p>
          </table:table-cell>
          <table:table-cell table:style-name="Table2.B1" office:value-type="string">
            <text:p text:style-name="P28"><loext:content-control loext:alias="Durée" loext:tag="Durée" loext:id="-1253278862"><text:span text:style-name="Dates">6 mois</text:span></loext:content-control></text:p>
          </table:table-cell>
        </table:table-row>
      </table:table>
      <text:p text:style-name="Standard"><draw:custom-shape text:anchor-type="char" draw:z-index="24" draw:name="Rectangle: Rounded Corners 39" draw:style-name="gr15" draw:text-style-name="P30" svg:width="15.874cm" svg:height="1.655cm" svg:x="0cm" svg:y="0.238cm"><text:p text:style-name="P29"><text:span text:style-name="T31">C, C++, ASM arm, ASM x86, gcc, arm-none-eabi-gcc, Python, unicorn, Ubuntu, bash, afl-fuzz, afl-cmin, make, valgrind, ghidra, cartographer, asan, ubsan, Unicorn engine, QEMU, lcov, gdb, FUSE</text:span></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text:p>
      <text:p text:style-name="Standard"/>
      <text:p text:style-name="Standard"><draw:custom-shape text:anchor-type="char" draw:z-index="25" draw:name="Rectangle: Rounded Corners 40" draw:style-name="gr16" draw:text-style-name="P31" svg:width="15.874cm" svg:height="2.451cm" svg:x="0cm" svg:y="0.445cm"><text:p text:style-name="Frame_20_contents"><text:span text:style-name="T32">Contexte</text:span><text:span text:style-name="T33"> : </text:span><loext:content-control loext:alias="Contexte" loext:tag="Contexte" loext:id="592823507"><text:span text:style-name="Style4"><text:span text:style-name="T19">Julien Lancia, mon tuteur de stage, voulait améliorer l’efficacité du fuzzing (tests logiciel avec des entrées pseudo-aléatoires) pour le bootloader MCUboot</text:span></text:span></loext:content-control><text:span text:style-name="Style4">. </text:span><text:span text:style-name="Style4"><text:span text:style-name="T19">Ce logiciel est utilisé pour charger des applications sécurisée</text:span></text:span><text:span text:style-name="Style4"><text:span text:style-name="T34">s</text:span></text:span><text:span text:style-name="Style4"><text:span text:style-name="T19"> sur les systèmes embarqués. Je travaillais avec Julien Lancia </text:span></text:span><text:span text:style-name="Style4"><text:span text:style-name="T34">et son équipe </text:span></text:span><text:span text:style-name="Style4"><text:span text:style-name="T19">sur </text:span></text:span><text:span text:style-name="Style4"><text:span text:style-name="T34">le sujet du fuzzing</text:span></text:span><text:span text:style-name="Style4"><text:span text:style-name="T19">.</text:span></text:span></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text:p>
      <text:p text:style-name="Standard"/>
      <text:p text:style-name="Standard"><text:span text:style-name="T32"/></text:p>
      <text:p text:style-name="Standard"><text:span text:style-name="Style5"/></text:p>
      <text:p text:style-name="Standard" loext:marker-style-name="T32"><loext:content-control loext:plain-text="true" loext:alias="Projet" loext:tag="Projet" loext:id="-1927405549"><text:span text:style-name="Style5"><text:span text:style-name="T35">Amélioration de la recherche automatique de vulnérabilités </text:span></text:span></loext:content-control></text:p>
      <text:list text:style-name="WWNum9">
        <text:list-item>
          <text:p text:style-name="P32" loext:marker-style-name="T36"><loext:content-control loext:plain-text="true" loext:alias="Activité" loext:tag="Activité" loext:id="-2087908454"><text:span text:style-name="Activités"><text:span text:style-name="T37">Développement d’un module de fuzzing structure-aware </text:span></text:span></loext:content-control></text:p>
          <text:list>
            <text:list-item>
              <text:p text:style-name="P33" loext:marker-style-name="T38"><text:span text:style-name="Texte"><text:span text:style-name="T37">Développement </text:span></text:span><text:span text:style-name="Texte"><text:span text:style-name="T35">et documentation</text:span></text:span><text:span text:style-name="Texte"><text:span text:style-name="T37"> en C d’un module de mutation intégrable à afl-fuzz </text:span></text:span><text:span text:style-name="Texte"><text:span text:style-name="T14">basé sur FormatFuzzer qui génére les entrées pour le programme cible.</text:span></text:span></text:p>
            </text:list-item>
            <text:list-item>
              <text:p text:style-name="P33" loext:marker-style-name="T38"><text:span text:style-name="Texte"><text:span text:style-name="T37">Ce module </text:span></text:span><text:span text:style-name="Texte"><text:span text:style-name="T35">est efficace, il</text:span></text:span><text:span text:style-name="Texte"><text:span text:style-name="T37"> génère </text:span></text:span><text:span text:style-name="Texte"><text:span text:style-name="T35">ou mute</text:span></text:span><text:span text:style-name="Texte"><text:span text:style-name="T37"> des entrées à partir d’une grammaire.</text:span></text:span></text:p>
            </text:list-item>
            <text:list-item>
              <text:p text:style-name="P33" loext:marker-style-name="T38"><text:span text:style-name="Texte"><text:span text:style-name="T39">3</text:span></text:span><text:span text:style-name="Texte"><text:span text:style-name="T37">00 heures</text:span></text:span></text:p>
              <text:p text:style-name="P32" loext:marker-style-name="T36"><text:span text:style-name="Style5"><text:span text:style-name="T36"/></text:span></text:p>
            </text:list-item>
          </text:list>
        </text:list-item>
        <text:list-item>
          <text:p text:style-name="P32" loext:marker-style-name="T40"><loext:content-control loext:plain-text="true" loext:alias="Activité" loext:tag="Activité" loext:id="-221522999"><text:span text:style-name="Activités"><text:span text:style-name="T41">Écriture de grammaires pour les formats tlv, ecdsa et mcuboot </text:span></text:span></loext:content-control></text:p>
          <text:list>
            <text:list-item>
              <text:p text:style-name="P32" loext:marker-style-name="T38"><loext:content-control loext:plain-text="true" loext:alias="Description tâches" loext:tag="Description tâches" loext:id="1032378036"><text:span text:style-name="Texte"><text:span text:style-name="T37">Codage des grammaires dans un langage proche du C, vérifications de conformité</text:span></text:span></loext:content-control><text:span text:style-name="Texte"><text:span text:style-name="T37">.</text:span></text:span></text:p>
            </text:list-item>
            <text:list-item>
              <text:p text:style-name="P34" loext:marker-style-name="T38"><text:span text:style-name="Texte"><text:span text:style-name="T35">Amélioration du parsing des inputs du bootloader MCUboot pour toute l’équipe, compatibilité assurée pour les logiciels 010 Editor, pfp et FormatFuzzer.</text:span></text:span></text:p>
            </text:list-item>
            <text:list-item>
              <text:p text:style-name="P34" loext:marker-style-name="T38"><text:span text:style-name="Texte"><text:span text:style-name="T42">150</text:span></text:span><text:span text:style-name="Texte"><text:span text:style-name="T35"> heures </text:span></text:span></text:p>
            </text:list-item>
          </text:list>
        </text:list-item>
        <text:list-item>
          <text:p text:style-name="P35" loext:marker-style-name="T40"><loext:content-control loext:plain-text="true" loext:alias="Activité" loext:tag="Activité" loext:id="-2057702646"/><loext:content-control loext:plain-text="true" loext:alias="Activité" loext:tag="Activité" loext:id="-221522999"><text:span text:style-name="Activités"><text:span text:style-name="T43">É</text:span></text:span></loext:content-control><text:span text:style-name="Activités"><text:span text:style-name="T44">mulation lors de l’exécution</text:span></text:span></text:p>
          <text:list>
            <text:list-item>
              <text:p text:style-name="P35" loext:marker-style-name="T38"><text:span text:style-name="Texte"><text:span text:style-name="T45">Unicorn permet d’émuler un logiciel </text:span></text:span><text:span text:style-name="Texte"><text:span text:style-name="T46">compilé pour une architecture cible (arm) différente de l’ordinateur hôte (x86_64) </text:span></text:span><text:span text:style-name="Texte"><text:span text:style-name="T45">via un ‘‘harness’’ en Python ou en C.</text:span></text:span></text:p>
            </text:list-item>
          </text:list>
        </text:list-item>
        <text:list-item>
          <text:p text:style-name="P32" loext:marker-style-name="T40"><loext:content-control loext:plain-text="true" loext:alias="Activité" loext:tag="Activité" loext:id="-2057702646"><text:span text:style-name="Activités"><text:span text:style-name="T35">Fuzzing avec le module développé et différentes grammaires </text:span></text:span></loext:content-control></text:p>
          <text:list>
            <text:list-item>
              <text:p text:style-name="P36" loext:marker-style-name="T38"><text:span text:style-name="Texte"><text:span text:style-name="T14">A</text:span></text:span><text:span text:style-name="Texte"><text:span text:style-name="T35">ugment</text:span></text:span><text:span text:style-name="Texte"><text:span text:style-name="T14">ation</text:span></text:span><text:span text:style-name="Texte"><text:span text:style-name="T35"> </text:span></text:span><text:span text:style-name="Texte"><text:span text:style-name="T14">du</text:span></text:span><text:span text:style-name="Texte"><text:span text:style-name="T35"> coverage (chemins empruntés dans le programme) du bootloader MCUboot : augmentant l’efficacité de la recherche de vulnérabilités.</text:span></text:span></text:p>
            </text:list-item>
            <text:list-item>
              <text:p text:style-name="P36" loext:marker-style-name="T38"><text:span text:style-name="Texte"><text:span text:style-name="T39">Intégration au CI/CD possible.</text:span></text:span></text:p>
            </text:list-item>
            <text:list-item>
              <text:p text:style-name="P37" loext:marker-style-name="T38"><text:span text:style-name="Texte"><text:span text:style-name="T47">Le module a permis de trouver 2 corruptions mémoire exploitables sur un parseur de TLV open-source.</text:span></text:span></text:p>
            </text:list-item>
            <text:list-item>
              <text:p text:style-name="P34" loext:marker-style-name="T38"><text:span text:style-name="Texte"><text:span text:style-name="T42">300</text:span></text:span><text:span text:style-name="Texte"><text:span text:style-name="T35"> heures</text:span></text:span></text:p>
              <text:p text:style-name="P38"/>
            </text:list-item>
          </text:list>
        </text:list-item>
      </text:list>
      <text:p text:style-name="Standard"><text:soft-page-break/></text:p>
      <text:p text:style-name="P39"/>
      <text:h text:style-name="P26" text:outline-level="2" loext:marker-style-name="T27"><loext:content-control loext:alias="Intitulé du poste" loext:id="763416416"><text:span text:style-name="Style3"><text:span text:style-name="T48">Consultant cybersécurité</text:span></text:span></loext:content-control><text:span text:style-name="T27"> <text:s text:c="15"/></text:span><loext:content-control loext:alias="Nom de l'entreprise" loext:tag="Nom de l'entreprise" loext:id="24605562"><text:span text:style-name="T49">Solving Company</text:span></loext:content-control></text:h>
      <table:table table:name="Table3" table:style-name="Table3">
        <table:table-column table:style-name="Table3.A"/>
        <table:table-column table:style-name="Table3.B"/>
        <table:table-row table:style-name="Table3.1">
          <table:table-cell table:style-name="Table3.A1" office:value-type="string">
            <text:p text:style-name="P27" loext:marker-style-name="T29"><loext:content-control loext:date="true" loext:date-format="MMMM yyyy" loext:date-rfc-language-tag="fr-FR" loext:current-date="2024-09-02T00:00:00Z" loext:alias="Date début" loext:tag="Date début" loext:id="1361013792"><text:span text:style-name="Style1"><text:span text:style-name="T39">septembre 2024</text:span></text:span></loext:content-control><text:span text:style-name="Dates"> </text:span><text:span text:style-name="T29">– </text:span><loext:content-control loext:date="true" loext:date-format="MMMM yyyy" loext:date-rfc-language-tag="fr-FR" loext:current-date="2025-03-01T00:00:00Z" loext:alias="Date fin" loext:tag="Date fin" loext:id="1770116876"><text:span text:style-name="T50">mars 2025</text:span></loext:content-control><text:span text:style-name="T29"> </text:span></text:p>
          </table:table-cell>
          <table:table-cell table:style-name="Table3.B1" office:value-type="string">
            <text:p text:style-name="P28" loext:marker-style-name="T29"><loext:content-control loext:alias="Durée" loext:tag="Durée" loext:id="1612696180"><text:span text:style-name="Dates"><text:span text:style-name="T39">7 mois</text:span></text:span></loext:content-control></text:p>
          </table:table-cell>
        </table:table-row>
      </table:table>
      <text:p text:style-name="Standard"><draw:custom-shape text:anchor-type="char" draw:z-index="26" draw:name="Rectangle: Rounded Corners 45" draw:style-name="gr17" draw:text-style-name="P41" svg:width="15.874cm" svg:height="1.017cm" svg:x="0cm" svg:y="0.238cm"><text:p text:style-name="P40" loext:marker-style-name="T51"><text:span text:style-name="T52">Windows 10, mac OS, </text:span><text:span text:style-name="T53">Debian</text:span><text:span text:style-name="T52">, php, Python, SQL, sécurité système, sécurité réseau, veille CVE</text:span></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text:p>
      <text:p text:style-name="Standard"><draw:custom-shape text:anchor-type="char" draw:z-index="11" draw:name="Rectangle: Rounded Corners 46" draw:style-name="gr16" draw:text-style-name="P31" svg:width="15.874cm" svg:height="2.451cm" svg:x="0cm" svg:y="0.612cm"><text:p text:style-name="Frame_20_contents"><text:span text:style-name="T32">Contexte</text:span><text:span text:style-name="T33"> : </text:span><loext:content-control loext:alias="Contexte" loext:tag="Contexte" loext:id="-1604099954"><text:span text:style-name="Style4"><text:span text:style-name="T54">En parallèle de mon master, j’ai accompagné l’équipe (3 personnes) de Solving Company pour vérifier la conformité RGPD et améliorer la gestion des informations sensibles comme les données génétiques et les identifiants</text:span></text:span><text:span text:style-name="Style4">.</text:span></loext:content-control></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text:p>
      <text:p text:style-name="Standard"/>
      <text:p text:style-name="P42" loext:marker-style-name="T32"/>
      <text:p text:style-name="P42" loext:marker-style-name="T32"/>
      <text:p text:style-name="Standard"><text:span text:style-name="Style5"/></text:p>
      <text:p text:style-name="Standard" loext:marker-style-name="T32"><loext:content-control loext:plain-text="true" loext:alias="Projet" loext:tag="Projet" loext:id="828403358"><text:span text:style-name="Style5"><text:span text:style-name="T55">Assistance pour conformité et cybersécurité </text:span></text:span></loext:content-control></text:p>
      <text:list text:continue-numbering="true" text:style-name="WWNum9">
        <text:list-item>
          <text:p text:style-name="P43" loext:marker-style-name="T36"><text:span text:style-name="Activités"><text:span text:style-name="T54">Travail basé sur le cahier des charges RGPD</text:span></text:span></text:p>
          <text:list>
            <text:list-item>
              <text:p text:style-name="P43" loext:marker-style-name="T38"><text:span text:style-name="Texte"><text:span text:style-name="T54">Présentation techniques, ajustements sur la collecte de données </text:span></text:span><text:span text:style-name="Texte"><text:span text:style-name="T56">de santé</text:span></text:span><text:span text:style-name="Texte"><text:span text:style-name="T54">.</text:span></text:span></text:p>
            </text:list-item>
            <text:list-item>
              <text:p text:style-name="P43" loext:marker-style-name="T38"><text:span text:style-name="Texte"><text:span text:style-name="T54">Changement d’algorithmes de chiffrement, vérification du salage des </text:span></text:span><text:span text:style-name="Texte"><text:span text:style-name="T56">mots de passe.</text:span></text:span></text:p>
            </text:list-item>
            <text:list-item>
              <text:p text:style-name="P43" loext:marker-style-name="T38"><text:span text:style-name="Texte"><text:span text:style-name="T28">40 h préparation, </text:span></text:span><text:span text:style-name="Texte"><text:span text:style-name="T54">10 heures sur place</text:span></text:span></text:p>
              <text:p text:style-name="P38"/>
            </text:list-item>
          </text:list>
        </text:list-item>
        <text:list-item>
          <text:p text:style-name="P32" loext:marker-style-name="T40"><loext:content-control loext:plain-text="true" loext:alias="Activité" loext:tag="Activité" loext:id="310676957"><text:span text:style-name="Activités"><text:span text:style-name="T28">Veille sur les vulnérabilités </text:span></text:span></loext:content-control></text:p>
          <text:list>
            <text:list-item>
              <text:p text:style-name="P32" loext:marker-style-name="T38"><loext:content-control loext:plain-text="true" loext:alias="Description tâches" loext:tag="Description tâches" loext:id="-1100015979"><text:span text:style-name="Texte"><text:span text:style-name="T28">Recherche des actualités sur les librairies critiques utilisées et veille active.</text:span></text:span></loext:content-control></text:p>
            </text:list-item>
            <text:list-item>
              <text:p text:style-name="P44" loext:marker-style-name="T38"><text:span text:style-name="Texte"><text:span text:style-name="T28">Message de notification à plusieurs reprises lors de dangers immédiats.</text:span></text:span></text:p>
            </text:list-item>
            <text:list-item>
              <text:p text:style-name="P44" loext:marker-style-name="T38"><text:span text:style-name="Texte"><text:span text:style-name="T28">4 heures par semaine environ</text:span></text:span><text:span text:style-name="Texte"><text:span text:style-name="T57"> </text:span></text:span></text:p>
              <text:p text:style-name="P45"/>
            </text:list-item>
          </text:list>
        </text:list-item>
        <text:list-item>
          <text:p text:style-name="P32" loext:marker-style-name="T40"><loext:content-control loext:plain-text="true" loext:alias="Activité" loext:tag="Activité" loext:id="-1782871185"><text:span text:style-name="Activités"><text:span text:style-name="T28">Préparation audit ANSSI et choix stratégiques </text:span></text:span></loext:content-control></text:p>
          <text:list>
            <text:list-item>
              <text:p text:style-name="P32" loext:marker-style-name="T38"><loext:content-control loext:plain-text="true" loext:alias="Description tâches" loext:tag="Description tâches" loext:id="2012719647"><text:span text:style-name="Texte"><text:span text:style-name="T28">Proposition de renforcement de sécurité système et réseau, étude des recommandations de l’ANSSI et préparation pour audit</text:span></text:span></loext:content-control><text:span text:style-name="Texte"><text:span text:style-name="T28">.</text:span></text:span></text:p>
            </text:list-item>
            <text:list-item>
              <text:p text:style-name="P44" loext:marker-style-name="T38"><text:span text:style-name="Texte"><text:span text:style-name="T28">Distribution de fiches réflexes, proposition d’hébergement </text:span></text:span><text:span text:style-name="Texte"><text:span text:style-name="T58">des serveurs </text:span></text:span><text:span text:style-name="Texte"><text:span text:style-name="T28">en Union Européenne, </text:span></text:span><text:span text:style-name="Texte"><text:span text:style-name="T58">proposition d’un plan de sauvegarde.</text:span></text:span></text:p>
            </text:list-item>
            <text:list-item>
              <text:p text:style-name="P46" loext:marker-style-name="T38"><text:span text:style-name="Texte"><text:span text:style-name="T42">30</text:span></text:span><text:span text:style-name="Texte"><text:span text:style-name="T55"> heures </text:span></text:span></text:p>
              <text:p text:style-name="P38"/>
            </text:list-item>
          </text:list>
        </text:list-item>
      </text:list>
      <text:p text:style-name="Standard"/>
      <text:p text:style-name="P39"/>
      <text:p text:style-name="Standard"/>
      <text:h text:style-name="P26" text:outline-level="2" loext:marker-style-name="T27"><text:span text:style-name="T27"><text:tab/>PROJETS SCOLAIRES / PROJETS PERSONNELS</text:span></text:h>
      <text:p text:style-name="P47"><text:span text:style-name="Style5"/></text:p>
      <text:p text:style-name="P47"><text:span text:style-name="Style5">Développeur Python (bénévolat) – </text:span><text:span text:style-name="Style5"><text:span text:style-name="T55">CREPT Toulouse</text:span></text:span></text:p>
      <text:p text:style-name="Standard"><draw:custom-shape text:anchor-type="char" draw:z-index="12" draw:name="Rectangle: Rounded Corners 48" draw:style-name="gr17" draw:text-style-name="P41" svg:width="15.874cm" svg:height="1.017cm" svg:x="0cm" svg:y="0.238cm"><text:p text:style-name="P48" loext:marker-style-name="T51"><text:span text:style-name="T59">Python, powershell, bash, Windows 10, Debian, LLM (IA)</text:span></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text:p>
      <text:p text:style-name="Standard"><draw:custom-shape text:anchor-type="char" draw:z-index="13" draw:name="Rectangle: Rounded Corners 49" draw:style-name="gr18" draw:text-style-name="P31" svg:width="15.874cm" svg:height="1.426cm" svg:x="0.002cm" svg:y="0.619cm"><text:p text:style-name="P49"><text:span text:style-name="T32">Contexte</text:span><text:span text:style-name="T33"> : </text:span><loext:content-control loext:alias="Contexte" loext:tag="Contexte" loext:id="-494187493"><text:span text:style-name="Style4"><text:span text:style-name="T60">Après mon stage de fin d’études chez STMicroelectronics, j’ai assisté Julien Chandelier sur des projets en Python et LLM local.</text:span></text:span></loext:content-control></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text:p>
      <text:p text:style-name="Standard"/>
      <text:p text:style-name="P42" loext:marker-style-name="T32"/>
      <text:list text:continue-numbering="true" text:style-name="WWNum9">
        <text:list-item>
          <text:p text:style-name="P46" loext:marker-style-name="T36"><text:span text:style-name="Activités"><text:span text:style-name="T55">Développement de logiciels en Python</text:span></text:span></text:p>
          <text:list>
            <text:list-item>
              <text:p text:style-name="P50" loext:marker-style-name="T38"><text:span text:style-name="Texte"><text:span text:style-name="T55">Développement et tests d’un outil de parsing sur des noms de fichier.</text:span></text:span></text:p>
            </text:list-item>
            <text:list-item>
              <text:p text:style-name="P50" loext:marker-style-name="T38"><text:span text:style-name="Texte"><text:span text:style-name="T55">Création d’un logiciel de capture d’image avec interface graphique en Pygame.</text:span></text:span></text:p>
            </text:list-item>
            <text:list-item>
              <text:p text:style-name="P46" loext:marker-style-name="T38"><text:span text:style-name="Texte"><text:span text:style-name="T55">2 logiciels documenté</text:span></text:span><text:span text:style-name="Texte"><text:span text:style-name="T56">s</text:span></text:span><text:span text:style-name="Texte"><text:span text:style-name="T55"> et fonctionnant sur différents systèmes d’exploitation.</text:span></text:span></text:p>
            </text:list-item>
            <text:list-item>
              <text:p text:style-name="P46" loext:marker-style-name="T38"><text:span text:style-name="Texte"><text:span text:style-name="T61">15</text:span></text:span><text:span text:style-name="Texte"><text:span text:style-name="T55"> heures</text:span></text:span><text:span text:style-name="Texte"><text:span text:style-name="T62"> </text:span></text:span></text:p>
              <text:p text:style-name="P38"/>
            </text:list-item>
          </text:list>
        </text:list-item>
      </text:list>
      <text:p text:style-name="P51"><text:span text:style-name="Style5"><text:span text:style-name="T58">Membre du groupe de travail cybersécurité – Association Alt- à Pessac</text:span></text:span></text:p>
      <text:p text:style-name="Standard"><draw:custom-shape text:anchor-type="char" draw:z-index="27" draw:name="Rectangle: Rounded Corners 55" draw:style-name="gr17" draw:text-style-name="P41" svg:width="15.874cm" svg:height="1.017cm" svg:x="0cm" svg:y="0.238cm"><text:p text:style-name="P52" loext:marker-style-name="T51"><text:span text:style-name="T63">Android, Windows 10, Mac OS, Bitwarden (gestionnaire de mots de passe)</text:span></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text:p>
      <text:p text:style-name="Standard"><draw:custom-shape text:anchor-type="char" draw:z-index="6" draw:name="Rectangle: Rounded Corners 56" draw:style-name="gr18" draw:text-style-name="P31" svg:width="15.874cm" svg:height="1.426cm" svg:x="0.002cm" svg:y="0.619cm"><text:p text:style-name="P53"><text:span text:style-name="T32">Contexte</text:span><text:span text:style-name="T33"> : </text:span><loext:content-control loext:alias="Contexte" loext:tag="Contexte" loext:id="-670110937"><text:span text:style-name="Style4"><text:span text:style-name="T64">Durant mon année de césure (année scolaire 2022 – 2023), j’ai été co-vice président de l’asso Alt- et mené le groupe de travail cybersécurité.</text:span></text:span></loext:content-control></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text:p>
      <text:p text:style-name="Standard"/>
      <text:p text:style-name="P42" loext:marker-style-name="T32"/>
      <text:list text:continue-numbering="true" text:style-name="WWNum9">
        <text:list-item>
          <text:p text:style-name="P54" loext:marker-style-name="T36"><text:span text:style-name="Activités"><text:span text:style-name="T58">Sensibilisation à la sécurité informatique</text:span></text:span></text:p>
          <text:list>
            <text:list-item>
              <text:p text:style-name="P54" loext:marker-style-name="T38"><loext:content-control loext:plain-text="true" loext:alias="Description tâches" loext:tag="Description tâches" loext:id="1348221165"><text:span text:style-name="Texte"><text:span text:style-name="T58">Avec les membres de l’association, nous avons migré les identifiants et fichiers sensibles de l’association sur des instances du gestionnaire de secrets Bitwarden.</text:span></text:span></loext:content-control></text:p>
            </text:list-item>
            <text:list-item>
              <text:p text:style-name="P54" loext:marker-style-name="T38"><text:span text:style-name="Texte"><text:span text:style-name="T58">Création de sauvegardes, sensibilisation des membres du Conseil d’Administration.</text:span></text:span></text:p>
            </text:list-item>
            <text:list-item>
              <text:p text:style-name="P54" loext:marker-style-name="T38"><text:span text:style-name="Texte"><text:span text:style-name="T65">25</text:span></text:span><text:span text:style-name="Texte"><text:span text:style-name="T58"> heures</text:span></text:span></text:p>
            </text:list-item>
          </text:list>
        </text:list-item>
      </text:list>
      <text:p text:style-name="P55"/>
      <text:p text:style-name="P55"/>
      <text:p text:style-name="P56"/>
      <text:p text:style-name="P51"><text:span text:style-name="Style5"><text:span text:style-name="T58">Jeu de codage Leek </text:span></text:span><text:span text:style-name="Style5"><text:span text:style-name="T66">W</text:span></text:span><text:span text:style-name="Style5"><text:span text:style-name="T58">ars</text:span></text:span></text:p>
      <text:p text:style-name="Standard"><draw:custom-shape text:anchor-type="char" draw:z-index="7" draw:name="Rectangle: Rounded Corners 57" draw:style-name="gr17" draw:text-style-name="P41" svg:width="15.874cm" svg:height="1.017cm" svg:x="0cm" svg:y="0.238cm"><text:p text:style-name="P57" loext:marker-style-name="T51"><text:span text:style-name="T67">Leekscript (ressemble au Java</text:span><text:span text:style-name="T68">Script</text:span><text:span text:style-name="T67">), algorithmes gloutons</text:span></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text:p>
      <text:p text:style-name="Standard"><draw:custom-shape text:anchor-type="char" draw:z-index="8" draw:name="Rectangle: Rounded Corners 58" draw:style-name="gr18" draw:text-style-name="P31" svg:width="15.874cm" svg:height="1.426cm" svg:x="0.002cm" svg:y="0.619cm"><text:p text:style-name="Frame_20_contents"><text:span text:style-name="T32">Contexte</text:span><text:span text:style-name="T33"> : </text:span><loext:content-control loext:alias="Contexte" loext:tag="Contexte" loext:id="-1709020181"><text:span text:style-name="Style4"><text:span text:style-name="T66">Un ami de master m’a initié à jeu de combat et programmation. Il faut programmer son poireau pour gérer divers combats avec un nombre limité de calculs.</text:span></text:span></loext:content-control></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text:p>
      <text:p text:style-name="Standard"/>
      <text:p text:style-name="P42" loext:marker-style-name="T32"/>
      <text:list text:continue-numbering="true" text:style-name="WWNum9">
        <text:list-item>
          <text:p text:style-name="P58" loext:marker-style-name="T36"><text:span text:style-name="Activités"><text:span text:style-name="T66">Codage de poireaux</text:span></text:span></text:p>
          <text:list>
            <text:list-item>
              <text:p text:style-name="P32" loext:marker-style-name="T38"><loext:content-control loext:plain-text="true" loext:alias="Description tâches" loext:tag="Description tâches" loext:id="1939716683"><text:span text:style-name="Texte"><text:span text:style-name="T66">Les challenges rencontrés sont parfois difficiles : sac à dos, voyageur de commerce...</text:span></text:span></loext:content-control></text:p>
            </text:list-item>
            <text:list-item>
              <text:p text:style-name="P58" loext:marker-style-name="T38"><loext:content-control loext:plain-text="true" loext:alias="Description tâches" loext:tag="Description tâches" loext:id="1939716683"><text:span text:style-name="Texte"><text:span text:style-name="T66">Création d’algorithmes pour choisir une suite d’action parmi un énorme ensemble.</text:span></text:span></loext:content-control><text:span text:style-name="Texte"><text:span text:style-name="T69"> </text:span></text:span></text:p>
            </text:list-item>
            <text:list-item>
              <text:p text:style-name="P58" loext:marker-style-name="T38"><text:span text:style-name="Texte"><text:span text:style-name="T66">1000 heures dont une majorité en conception, implémentation et tests.</text:span></text:span></text:p>
            </text:list-item>
          </text:list>
        </text:list-item>
      </text:list>
      <text:p text:style-name="Standard"/>
      <text:p text:style-name="P59"><text:span text:style-name="Style5"><text:span text:style-name="T70">Parallélisation</text:span></text:span></text:p>
      <text:p text:style-name="P60"><draw:custom-shape text:anchor-type="char" draw:z-index="9" draw:name="Rectangle: Rounded Corners 1" draw:style-name="gr17" draw:text-style-name="P41" svg:width="15.874cm" svg:height="1.017cm" svg:x="0cm" svg:y="0.238cm"><text:p text:style-name="P61" loext:marker-style-name="T51"><text:span text:style-name="T71">Parallélisation : C (OpenMP, OpenCL) / Python (concurrent.futures), </text:span><text:span text:style-name="T72">Sage, numpy, pandas</text:span></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text:p>
      <text:p text:style-name="P60"><draw:custom-shape text:anchor-type="char" draw:z-index="10" draw:name="Rectangle: Rounded Corners 2" draw:style-name="gr18" draw:text-style-name="P31" svg:width="15.874cm" svg:height="1.426cm" svg:x="0.002cm" svg:y="0.619cm"><text:p text:style-name="P49"><text:span text:style-name="T32">Contexte</text:span><text:span text:style-name="T33"> : </text:span><loext:content-control loext:alias="Contexte" loext:tag="Contexte" loext:id="-494187493"><text:span text:style-name="Style4"><text:span text:style-name="T60">A</text:span></text:span><text:span text:style-name="Style4"><text:span text:style-name="T73">près certains projets en cours, j’ai eu envie d’</text:span></text:span><text:span text:style-name="Style4"><text:span text:style-name="T74">améliorer les performances de mes programmes.</text:span></text:span></loext:content-control></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text:p>
      <text:p text:style-name="P60"/>
      <text:p text:style-name="P62" loext:marker-style-name="T32"/>
      <text:list text:continue-numbering="true" text:style-name="WWNum9">
        <text:list-item>
          <text:p text:style-name="P63" loext:marker-style-name="T36"><text:span text:style-name="Activités"><text:span text:style-name="T70">Calcul parallèle</text:span></text:span></text:p>
          <text:list>
            <text:list-item>
              <text:p text:style-name="P64" loext:marker-style-name="T38"><text:span text:style-name="Texte"><text:span text:style-name="T75">Parallélisation hybride CPU + GPU d’un programme C de simulation d’écoulement</text:span></text:span></text:p>
              <text:list>
                <text:list-item>
                  <text:p text:style-name="P65" loext:marker-style-name="T38"><text:span text:style-name="Texte"><text:span text:style-name="T70">Le programme est ralenti par la plus lente unité de calcul : pas intéressant</text:span></text:span></text:p>
                </text:list-item>
              </text:list>
            </text:list-item>
            <text:list-item>
              <text:p text:style-name="P63" loext:marker-style-name="T38"><text:span text:style-name="Texte"><text:span text:style-name="T75">Parallélisation </text:span></text:span><text:span text:style-name="Texte"><text:span text:style-name="T76">d’une attaque par faute sur AES (SCA) en Python</text:span></text:span></text:p>
              <text:list>
                <text:list-item>
                  <text:p text:style-name="P65" loext:marker-style-name="T38"><text:span text:style-name="Texte"><text:span text:style-name="T70">Résultat : l’</text:span></text:span><text:span text:style-name="Texte"><text:span text:style-name="T77">attaque</text:span></text:span><text:span text:style-name="Texte"><text:span text:style-name="T70"> va </text:span></text:span><text:span text:style-name="Texte"><text:span text:style-name="T77">environ</text:span></text:span><text:span text:style-name="Texte"><text:span text:style-name="T70"> 8 fois plus vite avec 16 cœurs</text:span></text:span></text:p>
                </text:list-item>
              </text:list>
            </text:list-item>
            <text:list-item>
              <text:p text:style-name="P65" loext:marker-style-name="T38"><text:span text:style-name="Texte"><text:span text:style-name="T70">~ </text:span></text:span><text:span text:style-name="Texte"><text:span text:style-name="T78">30</text:span></text:span><text:span text:style-name="Texte"><text:span text:style-name="T70"> heures au total</text:span></text:span></text:p>
            </text:list-item>
          </text:list>
        </text:list-item>
      </text:list>
      <text:p text:style-name="P66" loext:marker-style-name="T38"><text:span text:style-name="Texte"/></text:p>
      <text:p text:style-name="P66" loext:marker-style-name="T38"><text:span text:style-name="Texte"/></text:p>
      <text:p text:style-name="P59"><text:span text:style-name="Style5"><text:span text:style-name="T70">Refactorisation de code</text:span></text:span></text:p>
      <text:p text:style-name="P67"><draw:custom-shape text:anchor-type="char" draw:z-index="16" draw:name="Rectangle: Rounded Corners 3" draw:style-name="gr17" draw:text-style-name="P41" svg:width="15.874cm" svg:height="1.017cm" svg:x="0cm" svg:y="0.238cm"><text:p text:style-name="P61" loext:marker-style-name="T51"><text:span text:style-name="T71">Java, Junit5, </text:span><text:span text:style-name="T72">design patterns</text:span></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text:p>
      <text:p text:style-name="P67"><draw:custom-shape text:anchor-type="char" draw:z-index="17" draw:name="Rectangle: Rounded Corners 4" draw:style-name="gr18" draw:text-style-name="P31" svg:width="15.874cm" svg:height="1.426cm" svg:x="0.002cm" svg:y="0.619cm"><text:p text:style-name="P49"><text:span text:style-name="T32">Contexte</text:span><text:span text:style-name="T33"> : </text:span><loext:content-control loext:alias="Contexte" loext:tag="Contexte" loext:id="-494187493"><text:span text:style-name="Style4"><text:span text:style-name="T60">A</text:span></text:span><text:span text:style-name="Style4"><text:span text:style-name="T73">près </text:span></text:span><text:span text:style-name="Style4"><text:span text:style-name="T74">un projet de cours où la lisibilité du code étant médiocre et les tests étaient réalisés manuellement, j’ai voulu l’améliorer.</text:span></text:span></loext:content-control></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text:p>
      <text:p text:style-name="P67"/>
      <text:p text:style-name="P68" loext:marker-style-name="T32"/>
      <text:list text:continue-numbering="true" text:style-name="WWNum9">
        <text:list-item>
          <text:p text:style-name="P65" loext:marker-style-name="T36"><text:span text:style-name="Activités"><text:span text:style-name="T75">Refactorisation</text:span></text:span></text:p>
          <text:list>
            <text:list-item>
              <text:p text:style-name="P69" loext:marker-style-name="T38"><text:span text:style-name="Texte"><text:span text:style-name="T70">Modification du code</text:span></text:span><text:span text:style-name="Texte"><text:span text:style-name="T75"> d’un gestionnaire de restaurant en Java pour améliorer le cache. </text:span></text:span></text:p>
            </text:list-item>
            <text:list-item>
              <text:p text:style-name="P69" loext:marker-style-name="T38"><text:span text:style-name="Texte"><text:span text:style-name="T79">I</text:span></text:span><text:span text:style-name="Texte"><text:span text:style-name="T70">ntégr</text:span></text:span><text:span text:style-name="Texte"><text:span text:style-name="T79">ation de</text:span></text:span><text:span text:style-name="Texte"><text:span text:style-name="T70"> la gestion</text:span></text:span><text:span text:style-name="Texte"><text:span text:style-name="T75"> des exception, ajout de tests </text:span></text:span><text:span text:style-name="Texte"><text:span text:style-name="T79">unitaire avec</text:span></text:span><text:span text:style-name="Texte"><text:span text:style-name="T75"> Junit5</text:span></text:span><text:span text:style-name="Texte"> </text:span></text:p>
            </text:list-item>
            <text:list-item>
              <text:p text:style-name="P65" loext:marker-style-name="T38"><text:span text:style-name="Texte"><text:span text:style-name="T80">5</text:span></text:span><text:span text:style-name="Texte"><text:span text:style-name="T70"> heures au total</text:span></text:span></text:p>
            </text:list-item>
          </text:list>
        </text:list-item>
      </text:list>
      <text:p text:style-name="P7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entury Gothic" svg:font-family="'Century Gothic'" style:font-family-generic="swiss"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Times New Roman" svg:font-family="'Times New Roman'" style:font-family-generic="system" style:font-pitch="variable"/>
    <style:font-face style:name="Tw Cen MT" svg:font-family="'Tw Cen MT'" style:font-family-generic="system" style:font-pitch="variable"/>
    <style:font-face style:name="游ゴシック Light" svg:font-family="'游ゴシック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fr" fo:country="FR" style:letter-kerning="false" style:font-name-asian="Calibri2" style:font-size-asian="11pt" style:language-asian="en" style:country-asian="US" style:font-name-complex="Arial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2"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Standard" style:next-style-name="Standard" loext:linked-style-name="Titre_20_2_20_Car" style:default-outline-level="2" style:list-style-name="" style:class="chapter">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Times New Roman" style:font-family-complex="'Times New Roman'" style:font-family-generic-complex="system" style:font-pitch-complex="variable" style:font-size-complex="13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itre_20_client" style:display-name="Titre client" style:family="paragraph" style:parent-style-name="Heading_20_2" loext:linked-style-name="Titre_20_client_20_Car">
      <style:paragraph-properties fo:margin-top="0.423cm" fo:margin-bottom="0.141cm" style:contextual-spacing="false" fo:line-height="110%" fo:keep-together="auto" fo:padding-left="0cm" fo:padding-right="0cm" fo:padding-top="0cm" fo:padding-bottom="0.035cm" fo:border-left="none" fo:border-right="none" fo:border-top="none" fo:border-bottom="0.99pt solid #c45911" fo:keep-with-next="auto"/>
      <style:text-properties fo:color="#7f7f7f" loext:opacity="100%" style:font-name="Century Gothic" fo:font-family="'Century Gothic'" style:font-family-generic="swiss" style:font-pitch="variable" fo:font-size="12pt" fo:letter-spacing="0.035cm" fo:font-weight="bold" style:font-name-asian="Tw Cen MT" style:font-family-asian="'Tw Cen MT'" style:font-family-generic-asian="system" style:font-pitch-asian="variable" style:font-size-asian="12pt" style:font-weight-asian="bold" style:font-name-complex="Times New Roman" style:font-family-complex="'Times New Roman'" style:font-family-generic-complex="system" style:font-pitch-complex="variable" style:font-size-complex="12pt" style:font-weight-complex="bold">
        <loext:char-complex-color loext:theme-type="dark1" loext:color-type="theme">
          <loext:transformation loext:type="tint" loext:value="4980"/>
        </loext:char-complex-color>
      </style:text-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Titre_20_DDC" style:display-name="Titre DDC" style:family="text" style:parent-style-name="Default_20_Paragraph_20_Font">
      <style:text-properties fo:color="#ffffff" loext:opacity="100%" style:font-name="Century Gothic" fo:font-family="'Century Gothic'" style:font-family-generic="swiss" style:font-pitch="variable" fo:font-size="22pt" fo:font-weight="bold" style:font-size-asian="22pt" style:font-weight-asian="bold">
        <loext:char-complex-color loext:theme-type="light1" loext:color-type="theme"/>
      </style:text-properties>
    </style:style>
    <style:style style:name="Trigramme" style:family="text" style:parent-style-name="Default_20_Paragraph_20_Font">
      <style:text-properties fo:color="#ffffff" loext:opacity="100%" style:font-name="Century Gothic" fo:font-family="'Century Gothic'" style:font-family-generic="swiss" style:font-pitch="variable" fo:font-size="14pt" fo:font-weight="bold" style:font-size-asian="14pt" style:font-weight-asian="bold">
        <loext:char-complex-color loext:theme-type="light1" loext:color-type="theme"/>
      </style:text-properties>
    </style:style>
    <style:style style:name="Date_20_de_20__20_disponibilité" style:display-name="Date de  disponibilité" style:family="text" style:parent-style-name="Default_20_Paragraph_20_Font">
      <style:text-properties fo:color="#767a7d" loext:opacity="100%" fo:font-size="12pt" fo:font-weight="bold" style:font-size-asian="12pt" style:font-weight-asian="bold"/>
    </style:style>
    <style:style style:name="Texte" style:family="text" style:parent-style-name="Default_20_Paragraph_20_Font">
      <style:text-properties style:use-window-font-color="true" loext:opacity="0%" style:font-name="Century Gothic" fo:font-family="'Century Gothic'" style:font-family-generic="swiss" style:font-pitch="variable" fo:font-size="10pt" style:font-size-asian="10pt"/>
    </style:style>
    <style:style style:name="Titre_20_Catégorie" style:display-name="Titre Catégorie" style:family="text" style:parent-style-name="Default_20_Paragraph_20_Font">
      <style:text-properties fo:text-transform="uppercase" fo:color="#767a7d" loext:opacity="100%" style:font-name="Century Gothic" fo:font-family="'Century Gothic'" style:font-family-generic="swiss" style:font-pitch="variable" fo:font-size="10pt" fo:font-weight="bold" style:font-size-asian="10pt" style:font-weight-asian="bold"/>
    </style:style>
    <style:style style:name="Dates" style:family="text" style:parent-style-name="Default_20_Paragraph_20_Font">
      <style:text-properties fo:color="#767a7d" loext:opacity="100%" style:font-name="Century Gothic" fo:font-family="'Century Gothic'" style:font-family-generic="swiss" style:font-pitch="variable" fo:font-size="9pt" style:font-size-asian="9pt"/>
    </style:style>
    <style:style style:name="En-tête_20_Car" style:display-name="En-tête Car" style:family="text" style:parent-style-name="Default_20_Paragraph_20_Font" loext:linked-style-name="Header"/>
    <style:style style:name="Pied_20_de_20_page_20_Car" style:display-name="Pied de page Car" style:family="text" style:parent-style-name="Default_20_Paragraph_20_Font" loext:linked-style-name="Footer"/>
    <style:style style:name="Titre_20_client_20_Car" style:display-name="Titre client Car" style:family="text" style:parent-style-name="Titre_20_2_20_Car" loext:linked-style-name="Titre_20_client">
      <style:text-properties fo:color="#7f7f7f" loext:opacity="100%" style:font-name="Century Gothic" fo:font-family="'Century Gothic'" style:font-family-generic="swiss" style:font-pitch="variable" fo:font-size="12pt" fo:letter-spacing="0.035cm" fo:font-weight="bold" style:font-name-asian="Tw Cen MT" style:font-family-asian="'Tw Cen MT'" style:font-family-generic-asian="system" style:font-pitch-asian="variable" style:font-size-asian="12pt" style:font-weight-asian="bold" style:font-name-complex="Times New Roman" style:font-family-complex="'Times New Roman'" style:font-family-generic-complex="system" style:font-pitch-complex="variable" style:font-size-complex="12pt" style:font-weight-complex="bold">
        <loext:char-complex-color loext:theme-type="dark1" loext:color-type="theme">
          <loext:transformation loext:type="tint" loext:value="4980"/>
        </loext:char-complex-color>
      </style:text-properties>
    </style:style>
    <style:style style:name="Titre_20_2_20_Car" style:display-name="Titre 2 C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Times New Roman" style:font-family-complex="'Times New Roman'" style:font-family-generic-complex="system" style:font-pitch-complex="variable" style:font-size-complex="13pt">
        <loext:char-complex-color loext:theme-type="accent1" loext:color-type="theme">
          <loext:transformation loext:type="shade" loext:value="2509"/>
        </loext:char-complex-color>
      </style:text-properties>
    </style:style>
    <style:style style:name="Style1" style:family="text" style:parent-style-name="Dates">
      <style:text-properties fo:font-variant="small-caps" fo:color="#767a7d" loext:opacity="100%" style:font-name="Century Gothic" fo:font-family="'Century Gothic'" style:font-family-generic="swiss" style:font-pitch="variable" fo:font-size="9pt" style:font-size-asian="9pt"/>
    </style:style>
    <style:style style:name="Titre_20_xp" style:display-name="Titre xp" style:family="text" style:parent-style-name="Titre_20_Catégorie">
      <style:text-properties fo:text-transform="uppercase" fo:color="#767a7d" loext:opacity="100%" style:font-name="Century Gothic" fo:font-family="'Century Gothic'" style:font-family-generic="swiss" style:font-pitch="variable" fo:font-size="16pt" fo:font-weight="bold" style:font-size-asian="16pt" style:font-weight-asian="bold"/>
    </style:style>
    <style:style style:name="Style2" style:family="text" style:parent-style-name="Titre_20_xp">
      <style:text-properties fo:text-transform="uppercase" fo:color="#767a7d" loext:opacity="100%" style:font-name="Century Gothic" fo:font-family="'Century Gothic'" style:font-family-generic="swiss" style:font-pitch="variable" fo:font-size="16pt" fo:font-weight="bold" style:font-size-asian="16pt" style:font-weight-asian="bold"/>
    </style:style>
    <style:style style:name="Style3" style:family="text" style:parent-style-name="Titre_20_xp">
      <style:text-properties fo:font-variant="normal" fo:text-transform="none" fo:color="#767a7d" loext:opacity="100%" style:font-name="Century Gothic" fo:font-family="'Century Gothic'" style:font-family-generic="swiss" style:font-pitch="variable" fo:font-size="16pt" fo:font-weight="bold" style:font-size-asian="16pt" style:font-weight-asian="bold"/>
    </style:style>
    <style:style style:name="Contexte_20_technologique" style:display-name="Contexte technologique" style:family="text" style:parent-style-name="Default_20_Paragraph_20_Font">
      <style:text-properties fo:color="#ffffff" loext:opacity="100%" style:font-name="Calibri" fo:font-family="Calibri" style:font-family-generic="roman" style:font-pitch="variable" fo:font-size="10pt" fo:font-weight="bold" style:font-size-asian="10pt" style:font-weight-asian="bold">
        <loext:char-complex-color loext:theme-type="light1" loext:color-type="theme"/>
      </style:text-properties>
    </style:style>
    <style:style style:name="Style4" style:family="text" style:parent-style-name="Dates">
      <style:text-properties fo:color="#767a7d" loext:opacity="100%" style:font-name="Century Gothic" fo:font-family="'Century Gothic'" style:font-family-generic="swiss" style:font-pitch="variable" fo:font-size="10pt" fo:font-weight="bold" style:font-size-asian="10pt" style:font-weight-asian="bold"/>
    </style:style>
    <style:style style:name="Style5" style:family="text" style:parent-style-name="Dates">
      <style:text-properties fo:color="#767a7d" loext:opacity="100%" style:font-name="Century Gothic" fo:font-family="'Century Gothic'" style:font-family-generic="swiss" style:font-pitch="variable" fo:font-size="12pt" fo:font-weight="bold" style:font-size-asian="12pt" style:font-weight-asian="bold"/>
    </style:style>
    <style:style style:name="Activités" style:family="text" style:parent-style-name="Default_20_Paragraph_20_Font">
      <style:text-properties fo:color="#e80649" loext:opacity="100%" style:font-name="Century Gothic" fo:font-family="'Century Gothic'" style:font-family-generic="swiss" style:font-pitch="variable" fo:font-size="10pt" fo:font-weight="bold" style:font-size-asian="10pt" style:font-weight-asian="bold"/>
    </style:style>
    <style:style style:name="ListLabel_20_1" style:display-name="ListLabel 1" style:family="text">
      <style:text-properties fo:color="#e90649" loext:opacity="100%"/>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fo:color="#e90649" loext:opacity="100%"/>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fo:color="#e90649" loext:opacity="100%"/>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color="#e90649" loext:opacity="100%"/>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Calibri" fo:font-family="Calibri"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Calibri" fo:font-family="Calibri"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color="#e90649" loext:opacity="100%"/>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color="#e90649" loext:opacity="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color="#e90649" loext:opacity="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fo:color="#e90649" loext:opacity="100%"/>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Calibri" fo:font-family="Calibri" style:font-family-generic="roman" style:font-pitch="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Calibri" fo:font-family="Calibri" style:font-family-generic="roman" style:font-pitch="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fo:color="#e80649" loext:opacity="100%" fo:font-size="12pt" fo:font-weight="bold" style:font-size-asian="12pt" style:font-weight-asian="bold" style:font-size-complex="12pt" style:font-weight-complex="normal"/>
    </style:style>
    <style:style style:name="ListLabel_20_74" style:display-name="ListLabel 74" style:family="text">
      <style:text-properties fo:color="#767a7d" loext:opacity="100%" fo:font-size="10pt" style:font-size-asian="10pt" style:font-size-complex="10pt"/>
    </style:style>
    <style:style style:name="ListLabel_20_75" style:display-name="ListLabel 75" style:family="text"/>
    <style:style style:name="ListLabel_20_76" style:display-name="ListLabel 76" style:family="text">
      <style:text-properties style:font-name="Calibri" fo:font-family="Calibri" style:font-family-generic="roman" style:font-pitch="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Calibri" fo:font-family="Calibri" style:font-family-generic="roman" style:font-pitch="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fo:color="#e90649" loext:opacity="100%"/>
    </style:style>
    <style:style style:name="ListLabel_20_83" style:display-name="ListLabel 8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84" style:display-name="ListLabel 8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5" style:display-name="ListLabel 8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6" style:display-name="ListLabel 8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87" style:display-name="ListLabel 8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8" style:display-name="ListLabel 8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9" style:display-name="ListLabel 8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0" style:display-name="ListLabel 9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1" style:display-name="ListLabel 91" style:family="text">
      <style:text-properties fo:color="#e90649" loext:opacity="100%"/>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fo:color="#e90649" loext:opacity="100%"/>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Normal"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884cm"/>
        </style:list-level-properties>
        <style:text-properties fo:font-family="Wingdings" style:font-style-name="Normal"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Normal"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Normal"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Normal"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Normal"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Normal"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Normal"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Normal"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385cm"/>
        </style:list-level-properties>
        <style:text-properties fo:font-family="Wingdings" style:font-style-name="Normal"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Normal"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Normal"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Normal"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Normal"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Normal"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Normal"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Normal"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2.521cm"/>
        </style:list-level-properties>
        <style:text-properties fo:font-family="Wingdings" style:font-style-name="Normal"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Normal"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Normal" style:font-pitch="variable" style:font-charset="x-symbol"/>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386cm"/>
        </style:list-level-properties>
        <style:text-properties fo:font-family="Wingdings" style:font-style-name="Normal"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style:font-style-name="Normal"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style-name="Normal"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style-name="Normal"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style:font-style-name="Normal"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style-name="Normal"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style-name="Normal"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style:font-style-name="Normal"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4" number:language="fr" number:country="FR">
      <number:month number:style="long" number:textual="true"/>
      <number:text> </number:text>
      <number:year number:style="long"/>
    </number:date-style>
    <style:default-page-layout>
      <style:page-layout-properties style:writing-mode="lr-tb"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Table4" style:family="table">
      <style:table-properties style:width="16.002cm" style:rel-width="100%" fo:margin-top="0cm" fo:margin-bottom="0cm" table:align="center" style:writing-mode="page"/>
    </style:style>
    <style:style style:name="Table4.A" style:family="table-column">
      <style:table-column-properties style:column-width="14.773cm" style:rel-column-width="60501*"/>
    </style:style>
    <style:style style:name="Table4.B" style:family="table-column">
      <style:table-column-properties style:column-width="1.229cm" style:rel-column-width="5034*"/>
    </style:style>
    <style:style style:name="Table4.1" style:family="table-row">
      <style:table-row-properties style:min-row-height="0.362cm" fo:keep-together="auto"/>
    </style:style>
    <style:style style:name="Table4.A1" style:family="table-cell">
      <style:table-cell-properties fo:padding-left="0.203cm" fo:padding-right="0.203cm" fo:padding-top="0.127cm" fo:padding-bottom="0.127cm" fo:border-left="none" fo:border-right="none" fo:border-top="0.5pt solid #767a7d" fo:border-bottom="none"/>
    </style:style>
    <style:style style:name="Table4.B1" style:family="table-cell">
      <style:table-cell-properties fo:background-color="#e90649" fo:padding-left="0.203cm" fo:padding-right="0.203cm" fo:padding-top="0.127cm" fo:padding-bottom="0.127cm" fo:border-left="none" fo:border-right="none" fo:border-top="0.5pt solid #ed7d31" fo:border-bottom="none">
        <style:background-image/>
      </style:table-cell-properties>
    </style:style>
    <style:style style:name="Table5" style:family="table">
      <style:table-properties style:width="17.463cm" fo:margin-top="0cm" fo:margin-bottom="0cm" table:align="center" style:writing-mode="lr-tb"/>
    </style:style>
    <style:style style:name="Table5.A" style:family="table-column">
      <style:table-column-properties style:column-width="3.81cm"/>
    </style:style>
    <style:style style:name="Table5.B" style:family="table-column">
      <style:table-column-properties style:column-width="7.303cm"/>
    </style:style>
    <style:style style:name="Table5.C" style:family="table-column">
      <style:table-column-properties style:column-width="3.175cm"/>
    </style:style>
    <style:style style:name="Table5.1" style:family="table-row">
      <style:table-row-properties fo:keep-together="auto"/>
    </style:style>
    <style:style style:name="Table5.A1" style:family="table-cell">
      <style:table-cell-properties fo:background-color="transparent" fo:padding-left="0.191cm" fo:padding-right="0.191cm" fo:padding-top="0cm" fo:padding-bottom="0cm" fo:border-left="none" fo:border-right="0.5pt solid #808080" fo:border-top="none" fo:border-bottom="none" style:writing-mode="lr-tb">
        <style:background-image/>
      </style:table-cell-properties>
    </style:style>
    <style:style style:name="Table5.B1" style:family="table-cell">
      <style:table-cell-properties fo:background-color="transparent" fo:padding-left="0.191cm" fo:padding-right="0.191cm" fo:padding-top="0cm" fo:padding-bottom="0cm" fo:border-left="0.5pt solid #808080" fo:border-right="0.5pt solid #808080" fo:border-top="none" fo:border-bottom="none" style:writing-mode="lr-tb">
        <style:background-image/>
      </style:table-cell-properties>
    </style:style>
    <style:style style:name="Table5.D1" style:family="table-cell">
      <style:table-cell-properties fo:padding-left="0.191cm" fo:padding-right="0.191cm" fo:padding-top="0cm" fo:padding-bottom="0cm" fo:border-left="0.5pt solid #808080" fo:border-right="none" fo:border-top="none" fo:border-bottom="none" style:writing-mode="lr-tb"/>
    </style:style>
    <style:style style:name="MP1" style:family="paragraph" style:parent-style-name="Frame_20_contents">
      <style:paragraph-properties fo:text-align="center" style:justify-single-word="false"/>
    </style:style>
    <style:style style:name="MP2" style:family="paragraph">
      <loext:graphic-properties draw:fill="solid" draw:fill-color="#e40649"/>
      <style:paragraph-properties fo:text-align="start"/>
      <style:text-properties fo:color="#ffffff" loext:opacity="100%" fo:font-size="18pt"/>
    </style:style>
    <style:style style:name="MP3" style:family="paragraph" style:parent-style-name="Standard">
      <style:paragraph-properties fo:margin-top="0cm" fo:margin-bottom="0cm" style:contextual-spacing="false" fo:text-indent="0cm" style:auto-text-indent="false">
        <style:tab-stops>
          <style:tab-stop style:position="3.556cm"/>
          <style:tab-stop style:position="8.204cm"/>
          <style:tab-stop style:position="15.967cm" style:type="right"/>
        </style:tab-stops>
      </style:paragraph-properties>
    </style:style>
    <style:style style:name="MP4" style:family="paragraph" style:parent-style-name="Header">
      <style:paragraph-properties fo:text-align="end" style:justify-single-word="false"/>
    </style:style>
    <style:style style:name="MP5" style:family="paragraph" style:parent-style-name="Footer">
      <style:paragraph-properties fo:margin-top="0cm" fo:margin-bottom="0cm" style:contextual-spacing="false" fo:text-align="start" style:justify-single-word="false" fo:orphans="2" fo:widows="2"/>
      <style:text-properties style:font-name="Calibri1" fo:font-size="11pt" fo:language="fr" fo:country="FR" style:letter-kerning="false" style:font-name-asian="Calibri2" style:font-size-asian="11pt" style:language-asian="en" style:country-asian="US" style:font-name-complex="Arial1" style:font-size-complex="11pt" style:language-complex="ar" style:country-complex="SA"/>
    </style:style>
    <style:style style:name="MP6" style:family="paragraph" style:parent-style-name="Footer">
      <style:paragraph-properties fo:margin-top="0cm" fo:margin-bottom="0cm" style:contextual-spacing="false" fo:text-align="center" style:justify-single-word="false" fo:orphans="2" fo:widows="2"/>
      <style:text-properties style:font-name="Calibri1" fo:font-size="11pt" fo:language="fr" fo:country="FR" style:letter-kerning="false" style:font-name-asian="Calibri2" style:font-size-asian="11pt" style:language-asian="en" style:country-asian="US" style:font-name-complex="Arial1" style:font-size-complex="11pt" style:language-complex="ar" style:country-complex="SA"/>
    </style:style>
    <style:style style:name="MT1" style:family="text">
      <style:text-properties fo:font-size="14pt" fo:font-weight="bold" style:font-size-asian="14pt" style:font-weight-asian="bold"/>
    </style:style>
    <style:style style:name="MT2" style:family="text">
      <style:text-properties fo:color="#ffffff" loext:opacity="100%" fo:font-size="14pt" fo:font-weight="bold" style:font-size-asian="14pt" style:font-weight-asian="bold"/>
    </style:style>
    <style:style style:name="MT3" style:family="text">
      <style:text-properties fo:color="#808080" loext:opacity="100%" style:font-name="Century Gothic">
        <loext:char-complex-color loext:theme-type="light1" loext:color-type="theme">
          <loext:transformation loext:type="shade" loext:value="4980"/>
        </loext:char-complex-color>
      </style:text-properties>
    </style:style>
    <style:style style:name="MT4" style:family="text">
      <style:text-properties fo:color="#808080" loext:opacity="100%" style:font-name="Century Gothic">
        <loext:char-complex-color loext:theme-type="light1" loext:color-type="theme">
          <loext:transformation loext:type="tint" loext:value="0"/>
          <loext:transformation loext:type="shade" loext:value="4980"/>
        </loext:char-complex-color>
      </style:text-properties>
    </style:style>
    <style:style style:name="MT5" style:family="text">
      <style:text-properties fo:color="#ffffff" loext:opacity="100%">
        <loext:char-complex-color loext:theme-type="light1" loext:color-type="theme"/>
      </style:text-properties>
    </style:style>
    <style:style style:name="MT6" style:family="text">
      <style:text-properties fo:color="#ffffff" loext:opacity="100%" fo:font-size="12pt" fo:font-weight="bold" style:font-size-asian="12pt" style:font-weight-asian="bold" style:font-size-complex="12pt" style:font-weight-complex="bold">
        <loext:char-complex-color loext:theme-type="light1" loext:color-type="theme"/>
      </style:text-properties>
    </style:style>
    <style:style style:name="MT7" style:family="text">
      <style:text-properties fo:color="#767a7d" loext:opacity="100%" style:font-name="Century Gothic"/>
    </style:style>
    <style:style style:name="Mgr1" style:family="graphic" style:parent-style-name="Frame">
      <style:graphic-properties draw:stroke="none" svg:stroke-width="0.035cm" draw:stroke-linejoin="miter" svg:stroke-linecap="butt" draw:fill="solid" draw:fill-color="#e40649" draw:textarea-vertical-align="middle" draw:auto-grow-height="false" fo:min-height="0.753cm" fo:min-width="20.502cm" fo:padding-top="0.127cm" fo:padding-bottom="0.127cm" fo:padding-left="0.254cm" fo:padding-right="0.254cm" fo:wrap-option="wrap" loext:decorative="false"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7cm" fo:margin-bottom="0.6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99cm" fo:margin-left="0cm" fo:margin-right="0cm" fo:margin-bottom="1.699cm" style:dynamic-spacing="true"/>
      </style:header-style>
      <style:footer-style>
        <style:header-footer-properties fo:min-height="1.9cm" fo:margin-left="0cm" fo:margin-right="0cm" fo:margin-top="1.79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custom-shape text:anchor-type="char" draw:z-index="4" draw:name="Rectangle 34" draw:style-name="Mgr1" draw:text-style-name="MP2" svg:width="21.009cm" svg:height="1.006cm" svg:x="-2.54cm" svg:y="0.22cm"><text:p text:style-name="MP1" loext:marker-style-name="MT1"><text:span text:style-name="MT2">EXPERIENCES DETAILLE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first>
        <text:p text:style-name="Header"/>
      </style:header-first>
      <style:footer>
        <table:table table:name="Table4" table:style-name="Table4">
          <table:table-column table:style-name="Table4.A"/>
          <table:table-column table:style-name="Table4.B"/>
          <table:table-row table:style-name="Table4.1">
            <table:table-cell table:style-name="Table4.A1" office:value-type="string">
              <text:p text:style-name="MP3" loext:marker-style-name="MT3"><text:span text:style-name="MT3">S</text:span><text:span text:style-name="MT4">OLUTEC Toulouse </text:span></text:p>
            </table:table-cell>
            <table:table-cell table:style-name="Table4.B1" office:value-type="string">
              <text:p text:style-name="MP4" loext:marker-style-name="MT5"><text:span text:style-name="MT6"><text:page-number text:select-page="current">6</text:page-number></text:span><text:span text:style-name="MT5"><text:s/>/ </text:span><text:span text:style-name="MT6"><text:page-count>6</text:page-count></text:span></text:p>
            </table:table-cell>
          </table:table-row>
        </table:table>
        <text:p text:style-name="Footer"/>
      </style:footer>
      <style:footer-first>
        <table:table table:name="Table5" table:style-name="Table5">
          <table:table-column table:style-name="Table5.A"/>
          <table:table-column table:style-name="Table5.B"/>
          <table:table-column table:style-name="Table5.C" table:number-columns-repeated="2"/>
          <table:table-row table:style-name="Table5.1">
            <table:table-cell table:style-name="Table5.A1" office:value-type="string">
              <text:p text:style-name="MP5" loext:marker-style-name="MT7"><text:span text:style-name="MT7">SOLUTEC Toulouse</text:span><text:span text:style-name="MT7"/></text:p>
            </table:table-cell>
            <table:table-cell table:style-name="Table5.B1" office:value-type="string">
              <text:p text:style-name="MP5" loext:marker-style-name="MT7"><text:span text:style-name="MT7">Des compétences &amp; de la proximité</text:span><text:span text:style-name="MT7"/></text:p>
            </table:table-cell>
            <table:table-cell table:style-name="Table5.B1" office:value-type="string">
              <text:p text:style-name="MP5" loext:marker-style-name="MT7"><text:span text:style-name="MT7">04 78 64 32 92</text:span><text:span text:style-name="MT7"/></text:p>
            </table:table-cell>
            <table:table-cell table:style-name="Table5.D1" office:value-type="string">
              <text:p text:style-name="MP6" loext:marker-style-name="MT7"><text:span text:style-name="MT7">solutec.fr</text:span><text:span text:style-name="MT7"/></text:p>
            </table:table-cell>
          </table:table-row>
        </table:table>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jmercey-bon@solutec.fr</meta:initial-creator>
    <meta:editing-cycles>25</meta:editing-cycles>
    <meta:print-date>2025-11-11T18:58:22.601521500</meta:print-date>
    <meta:creation-date>2024-01-19T16:10:00</meta:creation-date>
    <dc:date>2026-01-06T11:55:44.114147000</dc:date>
    <meta:generator>LibreOffice/25.8.4.2$Windows_X86_64 LibreOffice_project/290daaa01b999472f0c7a3890eb6a550fd74c6df</meta:generator>
    <meta:editing-duration>PT1H26M32S</meta:editing-duration>
    <meta:printed-by>PDF files</meta:printed-by>
    <meta:document-statistic meta:table-count="5" meta:image-count="1" meta:object-count="0" meta:page-count="6" meta:paragraph-count="119" meta:word-count="1033" meta:character-count="6760" meta:non-whitespace-character-count="5800"/>
    <meta:user-defined meta:name="AppVersion">16.0000</meta:user-defined>
    <meta:user-defined meta:name="ContentTypeId">0x0101007C7273980EAF8A4AB04A4198BBCB7CDC</meta:user-defined>
    <meta:user-defined meta:name="MSIP_Label_67c4f19f-daf8-4710-809c-c07ade33235e_ActionId">96c6e5eb-2c63-4b1a-8350-9cae7171ac6b</meta:user-defined>
    <meta:user-defined meta:name="MSIP_Label_67c4f19f-daf8-4710-809c-c07ade33235e_ContentBits">0</meta:user-defined>
    <meta:user-defined meta:name="MSIP_Label_67c4f19f-daf8-4710-809c-c07ade33235e_Enabled" meta:value-type="string">true</meta:user-defined>
    <meta:user-defined meta:name="MSIP_Label_67c4f19f-daf8-4710-809c-c07ade33235e_Method" meta:value-type="string">Standard</meta:user-defined>
    <meta:user-defined meta:name="MSIP_Label_67c4f19f-daf8-4710-809c-c07ade33235e_Name" meta:value-type="string">Interne</meta:user-defined>
    <meta:user-defined meta:name="MSIP_Label_67c4f19f-daf8-4710-809c-c07ade33235e_SetDate" meta:value-type="string">2023-03-16T10:41:52Z</meta:user-defined>
    <meta:user-defined meta:name="MSIP_Label_67c4f19f-daf8-4710-809c-c07ade33235e_SiteId" meta:value-type="string">82d49724-d8e8-4ab1-971d-d78f0cb0dbdf</meta:user-defined>
    <meta:user-defined meta:name="Order" meta:value-type="float">13600</meta:user-defined>
    <meta:template xlink:type="simple" xlink:actuate="onRequest" xlink:title="TEMPLATE DDC" xlink:href=""/>
  </office:meta>
</office:document-meta>
</file>